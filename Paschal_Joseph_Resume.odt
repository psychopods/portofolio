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800000042C9D391FE.png" manifest:media-type="image/png"/>
  <manifest:file-entry manifest:full-path="Pictures/10000000000001240000016E5D4AF88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Courier New" svg:font-family="'Courier New'" style:font-family-generic="modern" style:font-pitch="fixed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1" style:family="table" style:master-page-name="MP0">
      <style:table-properties style:width="7.6667in" fo:margin-left="0in" style:page-number="auto" table:align="left"/>
    </style:style>
    <style:style style:name="Table1.A" style:family="table-column">
      <style:table-column-properties style:column-width="1.9444in"/>
    </style:style>
    <style:style style:name="Table1.B" style:family="table-column">
      <style:table-column-properties style:column-width="5.7222in"/>
    </style:style>
    <style:style style:name="Table1.1" style:family="table-row">
      <style:table-row-properties style:min-row-height="2.5625in"/>
    </style:style>
    <style:style style:name="Table1.A1" style:family="table-cell">
      <style:table-cell-properties fo:padding-left="0in" fo:padding-right="0in" fo:padding-top="0in" fo:padding-bottom="0.3472in" fo:border="none" style:writing-mode="lr-tb"/>
    </style:style>
    <style:style style:name="Table2" style:family="table">
      <style:table-properties style:width="5.5694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0.0694in"/>
    </style:style>
    <style:style style:name="Table2.A1" style:family="table-cell">
      <style:table-cell-properties fo:padding="0in" fo:border="none" style:writing-mode="lr-tb"/>
    </style:style>
    <style:style style:name="Table2.B1" style:family="table-cell">
      <style:table-cell-properties style:vertical-align="bottom" fo:padding="0in" fo:border="none" style:writing-mode="lr-tb"/>
    </style:style>
    <style:style style:name="Table3" style:family="table">
      <style:table-properties style:width="2.8125in" fo:margin-left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2.125in"/>
    </style:style>
    <style:style style:name="Table3.1" style:family="table-row">
      <style:table-row-properties style:min-row-height="0.1667in" style:use-optimal-row-height="false"/>
    </style:style>
    <style:style style:name="Table3.A1" style:family="table-cell">
      <style:table-cell-properties style:vertical-align="middle" fo:padding-left="0in" fo:padding-right="0in" fo:padding-top="0in" fo:padding-bottom="0.0972in" fo:border="none" style:writing-mode="lr-tb"/>
    </style:style>
    <style:style style:name="Table3.B1" style:family="table-cell">
      <style:table-cell-properties fo:padding-left="0in" fo:padding-right="0.0694in" fo:padding-top="0in" fo:padding-bottom="0.0972in" fo:border="none" style:writing-mode="lr-tb"/>
    </style:style>
    <style:style style:name="Table3.B2" style:family="table-cell">
      <style:table-cell-properties fo:padding-left="0in" fo:padding-right="0.0694in" fo:padding-top="0in" fo:padding-bottom="0.0972in" fo:border="none" style:writing-mode="lr-tb"/>
    </style:style>
    <style:style style:name="Table3.B3" style:family="table-cell">
      <style:table-cell-properties fo:padding-left="0in" fo:padding-right="0.0694in" fo:padding-top="0in" fo:padding-bottom="0.0972in" fo:border="none" style:writing-mode="lr-tb"/>
    </style:style>
    <style:style style:name="Table2" style:family="table">
      <style:table-properties style:width="5.5694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0.0694in"/>
    </style:style>
    <style:style style:name="Table2.A1" style:family="table-cell">
      <style:table-cell-properties fo:padding="0in" fo:border="none" style:writing-mode="lr-tb"/>
    </style:style>
    <style:style style:name="Table2.B1" style:family="table-cell">
      <style:table-cell-properties style:vertical-align="bottom" fo:padding="0in" fo:border="none" style:writing-mode="lr-tb"/>
    </style:style>
    <style:style style:name="Table3" style:family="table">
      <style:table-properties style:width="2.8125in" fo:margin-left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2.125in"/>
    </style:style>
    <style:style style:name="Table3.1" style:family="table-row">
      <style:table-row-properties style:min-row-height="0.1667in" style:use-optimal-row-height="false"/>
    </style:style>
    <style:style style:name="Table3.A1" style:family="table-cell">
      <style:table-cell-properties style:vertical-align="middle" fo:padding-left="0in" fo:padding-right="0in" fo:padding-top="0in" fo:padding-bottom="0.0972in" fo:border="none" style:writing-mode="lr-tb"/>
    </style:style>
    <style:style style:name="Table3.B1" style:family="table-cell">
      <style:table-cell-properties fo:padding-left="0in" fo:padding-right="0.0694in" fo:padding-top="0in" fo:padding-bottom="0.0972in" fo:border="none" style:writing-mode="lr-tb"/>
    </style:style>
    <style:style style:name="Table3.B2" style:family="table-cell">
      <style:table-cell-properties fo:padding-left="0in" fo:padding-right="0.0694in" fo:padding-top="0in" fo:padding-bottom="0.0972in" fo:border="none" style:writing-mode="lr-tb"/>
    </style:style>
    <style:style style:name="Table3.B3" style:family="table-cell">
      <style:table-cell-properties fo:padding-left="0in" fo:padding-right="0.0694in" fo:padding-top="0in" fo:padding-bottom="0.0972in" fo:border="none" style:writing-mode="lr-tb"/>
    </style:style>
    <style:style style:name="Table3" style:family="table">
      <style:table-properties style:width="2.8125in" fo:margin-left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2.125in"/>
    </style:style>
    <style:style style:name="Table3.1" style:family="table-row">
      <style:table-row-properties style:min-row-height="0.1667in" style:use-optimal-row-height="false"/>
    </style:style>
    <style:style style:name="Table3.A1" style:family="table-cell">
      <style:table-cell-properties style:vertical-align="middle" fo:padding-left="0in" fo:padding-right="0in" fo:padding-top="0in" fo:padding-bottom="0.0972in" fo:border="none" style:writing-mode="lr-tb"/>
    </style:style>
    <style:style style:name="Table3.B1" style:family="table-cell">
      <style:table-cell-properties fo:padding-left="0in" fo:padding-right="0.0694in" fo:padding-top="0in" fo:padding-bottom="0.0972in" fo:border="none" style:writing-mode="lr-tb"/>
    </style:style>
    <style:style style:name="Table3.B2" style:family="table-cell">
      <style:table-cell-properties fo:padding-left="0in" fo:padding-right="0.0694in" fo:padding-top="0in" fo:padding-bottom="0.0972in" fo:border="none" style:writing-mode="lr-tb"/>
    </style:style>
    <style:style style:name="Table3.B3" style:family="table-cell">
      <style:table-cell-properties fo:padding-left="0in" fo:padding-right="0.0694in" fo:padding-top="0in" fo:padding-bottom="0.0972in" fo:border="none" style:writing-mode="lr-tb"/>
    </style:style>
    <style:style style:name="Table4" style:family="table">
      <style:table-properties style:width="7.6354in" fo:margin-left="0.0313in" table:align="left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5.7604in"/>
    </style:style>
    <style:style style:name="Table4.A1" style:family="table-cell">
      <style:table-cell-properties fo:padding-left="0in" fo:padding-right="0in" fo:padding-top="0in" fo:padding-bottom="0.3472in" fo:border="none" style:writing-mode="lr-tb"/>
    </style:style>
    <style:style style:name="Table4.B1" style:family="table-cell">
      <style:table-cell-properties fo:padding-left="0.0174in" fo:padding-right="0in" fo:padding-top="0in" fo:padding-bottom="0.3472in" fo:border="none" style:writing-mode="lr-tb"/>
    </style:style>
    <style:style style:name="Table5" style:family="table">
      <style:table-properties style:width="7.6667in" fo:margin-left="0in" table:align="left"/>
    </style:style>
    <style:style style:name="Table5.A" style:family="table-column">
      <style:table-column-properties style:column-width="1.9097in"/>
    </style:style>
    <style:style style:name="Table5.B" style:family="table-column">
      <style:table-column-properties style:column-width="5.7569in"/>
    </style:style>
    <style:style style:name="Table5.1" style:family="table-row">
      <style:table-row-properties style:min-row-height="2.8958in"/>
    </style:style>
    <style:style style:name="Table5.A1" style:family="table-cell">
      <style:table-cell-properties fo:padding-left="0in" fo:padding-right="0in" fo:padding-top="0in" fo:padding-bottom="0.3472in" fo:border="none" style:writing-mode="lr-tb"/>
    </style:style>
    <style:style style:name="Table5.B1" style:family="table-cell">
      <style:table-cell-properties fo:padding-left="0.0174in" fo:padding-right="0in" fo:padding-top="0in" fo:padding-bottom="0.3472in" fo:border="none" style:writing-mode="lr-tb"/>
    </style:style>
    <style:style style:name="Table6" style:family="table">
      <style:table-properties style:width="5.7569in" fo:margin-left="0.0139in" table:align="left"/>
    </style:style>
    <style:style style:name="Table6.A" style:family="table-column">
      <style:table-column-properties style:column-width="2.8785in"/>
    </style:style>
    <style:style style:name="Table6.1" style:family="table-row">
      <style:table-row-properties style:min-row-height="2.7083in"/>
    </style:style>
    <style:style style:name="Table6.A1" style:family="table-cell">
      <style:table-cell-properties fo:padding-left="0in" fo:padding-right="0.1389in" fo:padding-top="0.0556in" fo:padding-bottom="0in" fo:border="none" style:writing-mode="lr-tb"/>
    </style:style>
    <style:style style:name="Table6.B1" style:family="table-cell">
      <style:table-cell-properties fo:padding-left="0in" fo:padding-right="0in" fo:padding-top="0.0556in" fo:padding-bottom="0in" fo:border="none" style:writing-mode="lr-tb"/>
    </style:style>
    <style:style style:name="Table6" style:family="table">
      <style:table-properties style:width="5.7569in" fo:margin-left="0.0139in" table:align="left"/>
    </style:style>
    <style:style style:name="Table6.A" style:family="table-column">
      <style:table-column-properties style:column-width="2.8785in"/>
    </style:style>
    <style:style style:name="Table6.1" style:family="table-row">
      <style:table-row-properties style:min-row-height="2.7083in"/>
    </style:style>
    <style:style style:name="Table6.A1" style:family="table-cell">
      <style:table-cell-properties fo:padding-left="0in" fo:padding-right="0.1389in" fo:padding-top="0.0556in" fo:padding-bottom="0in" fo:border="none" style:writing-mode="lr-tb"/>
    </style:style>
    <style:style style:name="Table6.B1" style:family="table-cell">
      <style:table-cell-properties fo:padding-left="0in" fo:padding-right="0in" fo:padding-top="0.0556in" fo:padding-bottom="0in" fo:border="none" style:writing-mode="lr-tb"/>
    </style:style>
    <style:style style:name="Table7" style:family="table">
      <style:table-properties style:width="7.6667in" fo:margin-left="0in" table:align="left"/>
    </style:style>
    <style:style style:name="Table7.A" style:family="table-column">
      <style:table-column-properties style:column-width="1.9097in"/>
    </style:style>
    <style:style style:name="Table7.B" style:family="table-column">
      <style:table-column-properties style:column-width="5.7569in"/>
    </style:style>
    <style:style style:name="Table7.A1" style:family="table-cell">
      <style:table-cell-properties fo:padding-left="0in" fo:padding-right="0in" fo:padding-top="0in" fo:padding-bottom="0.3472in" fo:border="none" style:writing-mode="lr-tb"/>
    </style:style>
    <style:style style:name="Table7.B1" style:family="table-cell">
      <style:table-cell-properties fo:padding-left="0.0174in" fo:padding-right="0in" fo:padding-top="0in" fo:padding-bottom="0.3472in" fo:border="none" style:writing-mode="lr-tb"/>
    </style:style>
    <style:style style:name="Table8" style:family="table">
      <style:table-properties style:width="7.6667in" fo:margin-left="0in" table:align="left"/>
    </style:style>
    <style:style style:name="Table8.A" style:family="table-column">
      <style:table-column-properties style:column-width="1.9097in"/>
    </style:style>
    <style:style style:name="Table8.B" style:family="table-column">
      <style:table-column-properties style:column-width="5.7569in"/>
    </style:style>
    <style:style style:name="Table8.A1" style:family="table-cell">
      <style:table-cell-properties fo:padding-left="0in" fo:padding-right="0in" fo:padding-top="0in" fo:padding-bottom="0.3472in" fo:border="none" style:writing-mode="lr-tb"/>
    </style:style>
    <style:style style:name="Table8.B1" style:family="table-cell">
      <style:table-cell-properties fo:padding-left="0.0174in" fo:padding-right="0in" fo:padding-top="0in" fo:padding-bottom="0.3472in" fo:border="none" style:writing-mode="lr-tb"/>
    </style:style>
    <style:style style:name="Table9" style:family="table">
      <style:table-properties style:width="7.6667in" fo:margin-left="0in" table:align="left"/>
    </style:style>
    <style:style style:name="Table9.A" style:family="table-column">
      <style:table-column-properties style:column-width="2.25in"/>
    </style:style>
    <style:style style:name="Table9.B" style:family="table-column">
      <style:table-column-properties style:column-width="5.4167in"/>
    </style:style>
    <style:style style:name="Table9.A1" style:family="table-cell">
      <style:table-cell-properties fo:padding-left="0in" fo:padding-right="0in" fo:padding-top="0in" fo:padding-bottom="0.3472in" fo:border="none" style:writing-mode="lr-tb"/>
    </style:style>
    <style:style style:name="Table9.B1" style:family="table-cell">
      <style:table-cell-properties fo:padding-left="0.0174in" fo:padding-right="0in" fo:padding-top="0in" fo:padding-bottom="0.3472in" fo:border="none" style:writing-mode="lr-tb"/>
    </style:style>
    <style:style style:name="Table10" style:family="table">
      <style:table-properties style:width="7.6667in" fo:margin-left="0in" table:align="left"/>
    </style:style>
    <style:style style:name="Table10.A" style:family="table-column">
      <style:table-column-properties style:column-width="1.9097in"/>
    </style:style>
    <style:style style:name="Table10.B" style:family="table-column">
      <style:table-column-properties style:column-width="5.7569in"/>
    </style:style>
    <style:style style:name="Table10.A1" style:family="table-cell">
      <style:table-cell-properties fo:padding-left="0in" fo:padding-right="0in" fo:padding-top="0in" fo:padding-bottom="0.3472in" fo:border="none" style:writing-mode="lr-tb"/>
    </style:style>
    <style:style style:name="Table10.B1" style:family="table-cell">
      <style:table-cell-properties fo:padding-left="0.0174in" fo:padding-right="0in" fo:padding-top="0in" fo:padding-bottom="0.3472in" fo:border="none" style:writing-mode="lr-tb"/>
    </style:style>
    <style:style style:name="Table11" style:family="table">
      <style:table-properties style:width="5.7569in" fo:margin-left="0in" table:align="left"/>
    </style:style>
    <style:style style:name="Table11.A" style:family="table-column">
      <style:table-column-properties style:column-width="2.7743in"/>
    </style:style>
    <style:style style:name="Table11.B" style:family="table-column">
      <style:table-column-properties style:column-width="0.2083in"/>
    </style:style>
    <style:style style:name="Table11.A1" style:family="table-cell">
      <style:table-cell-properties fo:padding-left="0in" fo:padding-right="0in" fo:padding-top="0.0556in" fo:padding-bottom="0in" fo:border="none" style:writing-mode="lr-tb"/>
    </style:style>
    <style:style style:name="Table11.2" style:family="table-row">
      <style:table-row-properties style:min-row-height="0.6042in"/>
    </style:style>
    <style:style style:name="Table11.A2" style:family="table-cell">
      <style:table-cell-properties fo:padding-left="0in" fo:padding-right="0in" fo:padding-top="0.0694in" fo:padding-bottom="0in" fo:border="none" style:writing-mode="lr-tb"/>
    </style:style>
    <style:style style:name="Table11.B2" style:family="table-cell">
      <style:table-cell-properties fo:padding="0in" fo:border="none" style:writing-mode="lr-tb"/>
    </style:style>
    <style:style style:name="Table11" style:family="table">
      <style:table-properties style:width="5.7569in" fo:margin-left="0in" table:align="left"/>
    </style:style>
    <style:style style:name="Table11.A" style:family="table-column">
      <style:table-column-properties style:column-width="2.7743in"/>
    </style:style>
    <style:style style:name="Table11.B" style:family="table-column">
      <style:table-column-properties style:column-width="0.2083in"/>
    </style:style>
    <style:style style:name="Table11.A1" style:family="table-cell">
      <style:table-cell-properties fo:padding-left="0in" fo:padding-right="0in" fo:padding-top="0.0556in" fo:padding-bottom="0in" fo:border="none" style:writing-mode="lr-tb"/>
    </style:style>
    <style:style style:name="Table11.2" style:family="table-row">
      <style:table-row-properties style:min-row-height="0.6042in"/>
    </style:style>
    <style:style style:name="Table11.A2" style:family="table-cell">
      <style:table-cell-properties fo:padding-left="0in" fo:padding-right="0in" fo:padding-top="0.0694in" fo:padding-bottom="0in" fo:border="none" style:writing-mode="lr-tb"/>
    </style:style>
    <style:style style:name="Table11.B2" style:family="table-cell">
      <style:table-cell-properties fo:padding="0in" fo:border="none" style:writing-mode="lr-tb"/>
    </style:style>
    <style:style style:name="Table12" style:family="table">
      <style:table-properties style:width="7.6979in" fo:margin-left="-0.0313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5.7604in"/>
    </style:style>
    <style:style style:name="Table12.A1" style:family="table-cell">
      <style:table-cell-properties fo:padding-left="0in" fo:padding-right="0in" fo:padding-top="0in" fo:padding-bottom="0.3472in" fo:border="none" style:writing-mode="lr-tb"/>
    </style:style>
    <style:style style:name="Table12.B1" style:family="table-cell">
      <style:table-cell-properties fo:padding-left="0.0174in" fo:padding-right="0in" fo:padding-top="0in" fo:padding-bottom="0.3472in" fo:border="none" style:writing-mode="lr-tb"/>
    </style:style>
    <style:style style:name="Table13" style:family="table">
      <style:table-properties style:width="7.6667in" fo:margin-left="0in" table:align="left"/>
    </style:style>
    <style:style style:name="Table13.A" style:family="table-column">
      <style:table-column-properties style:column-width="1.9097in"/>
    </style:style>
    <style:style style:name="Table13.B" style:family="table-column">
      <style:table-column-properties style:column-width="5.7569in"/>
    </style:style>
    <style:style style:name="Table13.A1" style:family="table-cell">
      <style:table-cell-properties fo:padding-left="0in" fo:padding-right="0in" fo:padding-top="0in" fo:padding-bottom="0.3472in" fo:border="none" style:writing-mode="lr-tb"/>
    </style:style>
    <style:style style:name="Table13.B1" style:family="table-cell">
      <style:table-cell-properties fo:padding-left="0.0174in" fo:padding-right="0in" fo:padding-top="0in" fo:padding-bottom="0.3472in" fo:border="none" style:writing-mode="lr-tb"/>
    </style:style>
    <style:style style:name="P1" style:family="paragraph" style:parent-style-name="Normal">
      <style:text-properties text:display="none"/>
    </style:style>
    <style:style style:name="P2" style:family="paragraph" style:parent-style-name="Normal">
      <style:paragraph-properties fo:line-height="0.0098in"/>
    </style:style>
    <style:style style:name="P3" style:family="paragraph" style:parent-style-name="document_5f_left-box_20_Paragraph">
      <style:paragraph-properties fo:line-height="150%" fo:break-before="page" style:vertical-align="auto"/>
    </style:style>
    <style:style style:name="P4" style:family="paragraph" style:parent-style-name="parentContainer_5f_sectiontable_5f_heading_20_Paragraph">
      <style:paragraph-properties fo:line-height="150%" style:vertical-align="auto"/>
      <style:text-properties style:font-name="Times New Roman" fo:font-size="12pt" style:font-size-asian="12pt" style:font-size-complex="12pt"/>
    </style:style>
    <style:style style:name="P5" style:family="paragraph" style:parent-style-name="document_5f_skill_5f_paddedline1_20_Paragraph">
      <style:paragraph-properties fo:margin-left="0.0138in" fo:line-height="150%" fo:padding="0in" fo:border="none" style:shadow="non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document_5f_dispBlock">
      <style:paragraph-properties fo:margin-left="0.0138in" fo:margin-top="0.0555in" fo:margin-bottom="0in" style:contextual-spacing="false" fo:line-height="150%">
        <style:tab-stops/>
      </style:paragraph-properties>
      <style:text-properties officeooo:paragraph-rsid="000d54ad"/>
    </style:style>
    <style:style style:name="P7" style:family="paragraph" style:parent-style-name="document_5f_dispBlock">
      <style:paragraph-properties fo:margin-left="0.0138in" fo:line-height="150%">
        <style:tab-stops/>
      </style:paragraph-properties>
      <style:text-properties officeooo:paragraph-rsid="000d54ad"/>
    </style:style>
    <style:style style:name="P8" style:family="paragraph" style:parent-style-name="document_5f_dispBlock">
      <style:paragraph-properties fo:margin-left="0.0138in" fo:line-height="150%">
        <style:tab-stops/>
      </style:paragraph-properties>
    </style:style>
    <style:style style:name="P9" style:family="paragraph" style:parent-style-name="document_5f_education_5f_paragraphspacing">
      <style:paragraph-properties fo:margin-left="0.0138in" fo:margin-top="0.0555in" fo:margin-bottom="0in" style:contextual-spacing="false" fo:line-height="150%">
        <style:tab-stops/>
      </style:paragraph-properties>
    </style:style>
    <style:style style:name="P10" style:family="paragraph" style:parent-style-name="document_5f_education_5f_paragraphspacing">
      <style:paragraph-properties fo:margin-left="0.0138in" fo:line-height="150%">
        <style:tab-stops/>
      </style:paragraph-properties>
    </style:style>
    <style:style style:name="P11" style:family="paragraph" style:parent-style-name="document_5f_txtItl">
      <style:paragraph-properties fo:margin-left="0.0138in" fo:line-height="150%">
        <style:tab-stops/>
      </style:paragraph-properties>
    </style:style>
    <style:style style:name="P12" style:family="paragraph" style:parent-style-name="Horizontal_20_Line">
      <style:paragraph-properties fo:line-height="150%"/>
      <style:text-properties style:font-name="Times New Roman" fo:font-size="12pt" style:font-size-asian="12pt" style:font-size-complex="12pt"/>
    </style:style>
    <style:style style:name="P13" style:family="paragraph" style:parent-style-name="Normal">
      <style:paragraph-properties fo:line-height="150%"/>
      <style:text-properties style:font-name="Times New Roman" fo:font-weight="bold" style:font-weight-asian="bold" style:font-weight-complex="bold"/>
    </style:style>
    <style:style style:name="P14" style:family="paragraph" style:parent-style-name="Normal">
      <style:paragraph-properties fo:line-height="150%"/>
      <style:text-properties style:font-name="Times New Roman" fo:font-size="12pt" style:font-size-asian="12pt" style:font-size-complex="12pt"/>
    </style:style>
    <style:style style:name="P15" style:family="paragraph" style:parent-style-name="Normal">
      <style:paragraph-properties fo:margin-top="0.0555in" fo:margin-bottom="0in" style:contextual-spacing="false" fo:line-height="150%"/>
      <style:text-properties style:font-name="Times New Roman" fo:font-size="12pt" style:font-size-asian="12pt" style:font-size-complex="12pt"/>
    </style:style>
    <style:style style:name="P16" style:family="paragraph" style:parent-style-name="Normal">
      <style:paragraph-properties fo:line-height="150%"/>
      <style:text-properties style:font-name="Times New Roman"/>
    </style:style>
    <style:style style:name="P17" style:family="paragraph" style:parent-style-name="Normal">
      <style:paragraph-properties fo:line-height="150%"/>
    </style:style>
    <style:style style:name="P18" style:family="paragraph" style:parent-style-name="Normal">
      <style:paragraph-properties fo:line-height="150%"/>
      <style:text-properties officeooo:paragraph-rsid="00135f75"/>
    </style:style>
    <style:style style:name="P19" style:family="paragraph" style:parent-style-name="Normal">
      <style:paragraph-properties fo:line-height="150%"/>
      <style:text-properties officeooo:paragraph-rsid="000c6533"/>
    </style:style>
    <style:style style:name="P20" style:family="paragraph" style:parent-style-name="Standard">
      <style:paragraph-properties fo:margin-left="0.0138in" fo:margin-top="0.0555in" fo:margin-bottom="0in" style:contextual-spacing="false" fo:line-height="150%">
        <style:tab-stops/>
      </style:paragraph-properties>
      <style:text-properties fo:font-variant="normal" fo:text-transform="none" fo:color="#212529" loext:opacity="100%" style:font-name="Times New Roman" fo:font-size="12pt" fo:letter-spacing="normal" fo:font-style="normal" fo:font-weight="normal" officeooo:paragraph-rsid="001285fb" style:font-size-asian="12pt" style:font-size-complex="12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loext:opacity="100%" style:font-name="Times New Roman" fo:font-size="12pt" fo:letter-spacing="normal" fo:font-style="normal" fo:font-weight="bold" style:font-size-asian="12pt" style:font-size-complex="12pt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loext:opacity="100%" style:font-name="Times New Roman" fo:font-size="12pt" fo:letter-spacing="normal" fo:font-style="normal" fo:font-weight="bold" style:font-size-asian="12pt" style:font-size-complex="12pt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3">
      <style:paragraph-properties fo:margin-left="0.1528in" fo:line-height="150%" fo:text-indent="-0.1335in" style:auto-text-indent="false">
        <style:tab-stops/>
      </style:paragraph-properties>
      <style:text-properties officeooo:paragraph-rsid="000d54ad"/>
    </style:style>
    <style:style style:name="P27" style:family="paragraph" style:parent-style-name="Text_20_body" style:list-style-name="L2">
      <style:paragraph-properties fo:margin-left="0.1528in" fo:line-height="150%" fo:text-indent="-0.1335in" style:auto-text-indent="false">
        <style:tab-stops/>
      </style:paragraph-properties>
    </style:style>
    <style:style style:name="P28" style:family="paragraph" style:parent-style-name="div">
      <style:paragraph-properties fo:margin-left="0in" fo:line-height="150%" fo:text-indent="0in" style:auto-text-indent="false" fo:padding-left="0in" fo:padding-right="0in" fo:padding-top="0.278in" fo:padding-bottom="0in" fo:border-left="none" fo:border-right="none" fo:border-top="none" fo:border-bottom="0.26pt dashed #020303" style:shadow="none">
        <style:tab-stops/>
      </style:paragraph-properties>
      <style:text-properties style:font-name="Times New Roman" fo:font-size="12pt" officeooo:paragraph-rsid="000d54ad" style:font-size-asian="12pt" style:font-size-complex="12pt"/>
    </style:style>
    <style:style style:name="P29" style:family="paragraph" style:parent-style-name="div">
      <style:paragraph-properties fo:margin-left="0.0138in" fo:line-height="150%" fo:padding-left="0in" fo:padding-right="0in" fo:padding-top="0.278in" fo:padding-bottom="0in" fo:border-left="none" fo:border-right="none" fo:border-top="none" fo:border-bottom="0.26pt dashed #020303" style:shadow="non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div">
      <style:paragraph-properties fo:margin-left="0.0138in" fo:line-height="150%" fo:padding="0in" fo:border-left="none" fo:border-right="none" fo:border-top="none" fo:border-bottom="0.26pt dashed #020303" style:shadow="non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div">
      <style:paragraph-properties fo:margin-left="0.0138in" fo:line-height="150%">
        <style:tab-stops/>
      </style:paragraph-properties>
    </style:style>
    <style:style style:name="P32" style:family="paragraph" style:parent-style-name="div">
      <style:paragraph-properties fo:margin-left="0.0138in" fo:line-height="150%">
        <style:tab-stops/>
      </style:paragraph-properties>
      <style:text-properties officeooo:paragraph-rsid="0013e51e"/>
    </style:style>
    <style:style style:name="P33" style:family="paragraph" style:parent-style-name="div">
      <style:paragraph-properties fo:margin-left="0.0138in" fo:line-height="150%">
        <style:tab-stops>
          <style:tab-stop style:position="2.7465in" style:type="right"/>
        </style:tab-stops>
      </style:paragraph-properties>
    </style:style>
    <style:style style:name="P34" style:family="paragraph" style:parent-style-name="document_5f_iconInnerTable_20_Paragraph">
      <style:paragraph-properties fo:line-height="150%"/>
      <style:text-properties style:font-name="Times New Roman"/>
    </style:style>
    <style:style style:name="P35" style:family="paragraph" style:parent-style-name="document_5f_name">
      <style:paragraph-properties fo:margin-top="0in" fo:margin-bottom="0.222in" style:contextual-spacing="false" fo:line-height="150%" fo:padding="0in" fo:border="none" style:shadow="none"/>
      <style:text-properties officeooo:paragraph-rsid="00135f75"/>
    </style:style>
    <style:style style:name="P36" style:family="paragraph" style:parent-style-name="document_5f_sectiontitle">
      <style:paragraph-properties fo:margin-right="0.2362in" fo:line-height="150%" fo:padding-left="0in" fo:padding-right="0.2362in" fo:padding-top="0in" fo:padding-bottom="0in" fo:border="none" style:shadow="none"/>
    </style:style>
    <style:style style:name="P37" style:family="paragraph" style:parent-style-name="document_5f_ul_5f_li" style:list-style-name="L3">
      <style:paragraph-properties fo:margin-left="0.1528in" fo:line-height="150%" fo:text-indent="-0.1335in" style:auto-text-indent="false">
        <style:tab-stops/>
      </style:paragraph-properties>
      <style:text-properties officeooo:paragraph-rsid="000d54ad"/>
    </style:style>
    <style:style style:name="P38" style:family="paragraph" style:parent-style-name="document_5f_ul_5f_li" style:list-style-name="L3">
      <style:paragraph-properties fo:margin-left="0.1528in" fo:line-height="150%" fo:text-indent="-0.1335in" style:auto-text-indent="false">
        <style:tab-stops/>
      </style:paragraph-properties>
      <style:text-properties officeooo:paragraph-rsid="000fdc62"/>
    </style:style>
    <style:style style:name="P39" style:family="paragraph" style:parent-style-name="document_5f_ul_5f_li" style:list-style-name="L3">
      <style:paragraph-properties fo:margin-left="0.1528in" fo:line-height="150%" fo:text-indent="-0.1335in" style:auto-text-indent="false">
        <style:tab-stops/>
      </style:paragraph-properties>
    </style:style>
    <style:style style:name="P40" style:family="paragraph" style:parent-style-name="document_5f_ul_5f_li" style:list-style-name="L4">
      <style:paragraph-properties fo:margin-left="0.1528in" fo:line-height="150%" fo:text-indent="-0.1335in" style:auto-text-indent="false">
        <style:tab-stops/>
      </style:paragraph-properties>
    </style:style>
    <style:style style:name="P41" style:family="paragraph" style:parent-style-name="document_5f_ul_5f_li" style:list-style-name="L1">
      <style:paragraph-properties fo:margin-left="0.1528in" fo:line-height="150%" fo:text-indent="-0.1335in" style:auto-text-indent="false">
        <style:tab-stops/>
      </style:paragraph-properties>
    </style:style>
    <style:style style:name="P42" style:family="paragraph" style:parent-style-name="document_5f_ul_5f_li" style:list-style-name="L2">
      <style:paragraph-properties fo:margin-left="0.1528in" fo:line-height="150%" fo:text-indent="-0.1335in" style:auto-text-indent="false">
        <style:tab-stops/>
      </style:paragraph-properties>
    </style:style>
    <style:style style:name="P43" style:family="paragraph" style:parent-style-name="document_5f_ul_5f_li" style:list-style-name="L5">
      <style:paragraph-properties fo:margin-left="0.1528in" fo:margin-top="0.0555in" fo:margin-bottom="0in" style:contextual-spacing="false" fo:line-height="150%" fo:text-indent="-0.1335in" style:auto-text-indent="false">
        <style:tab-stops/>
      </style:paragraph-properties>
    </style:style>
    <style:style style:name="P44" style:family="paragraph" style:parent-style-name="document_5f_ul_5f_li" style:list-style-name="L6">
      <style:paragraph-properties fo:margin-left="0.1528in" fo:margin-top="0.0555in" fo:margin-bottom="0in" style:contextual-spacing="false" fo:line-height="150%" fo:text-indent="-0.1335in" style:auto-text-indent="false">
        <style:tab-stops/>
      </style:paragraph-properties>
      <style:text-properties officeooo:paragraph-rsid="0012a0af"/>
    </style:style>
    <style:style style:name="P45" style:family="paragraph" style:parent-style-name="p">
      <style:paragraph-properties fo:margin-left="0.0138in" fo:margin-top="0.0555in" fo:margin-bottom="0in" style:contextual-spacing="false" fo:line-height="150%">
        <style:tab-stops/>
      </style:paragraph-properties>
    </style:style>
    <style:style style:name="P46" style:family="paragraph" style:parent-style-name="span_20_Paragraph">
      <style:paragraph-properties fo:margin-left="0.0138in" fo:line-height="150%" style:vertical-align="auto">
        <style:tab-stops/>
      </style:paragraph-properties>
    </style:style>
    <style:style style:name="P47" style:family="paragraph" style:parent-style-name="span_20_Paragraph">
      <style:paragraph-properties fo:margin-left="0.0138in" fo:line-height="150%" style:vertical-align="auto">
        <style:tab-stops/>
      </style:paragraph-properties>
      <style:text-properties officeooo:paragraph-rsid="0013e51e"/>
    </style:style>
    <style:style style:name="P48" style:family="paragraph">
      <loext:graphic-properties draw:fill="none"/>
    </style:style>
    <style:style style:name="T1" style:family="text">
      <style:text-properties fo:color="#020303" loext:opacity="100%" style:font-name="Century Gothic1" fo:font-size="10pt" style:font-name-asian="Century Gothic1" style:font-size-asian="10pt" style:font-name-complex="Century Gothic1" style:font-size-complex="10pt"/>
    </style:style>
    <style:style style:name="T2" style:family="text">
      <style:text-properties fo:color="#020303" loext:opacity="100%" style:font-name="Century Gothic1" fo:font-size="10pt" officeooo:rsid="001285fb" style:font-name-asian="Century Gothic1" style:font-size-asian="10pt" style:font-name-complex="Century Gothic1" style:font-size-complex="10pt"/>
    </style:style>
    <style:style style:name="T3" style:family="text">
      <style:text-properties fo:color="#020303" loext:opacity="100%" fo:font-size="10pt" style:font-name-asian="Century Gothic1" style:font-size-asian="10pt" style:font-name-complex="Century Gothic1" style:font-size-complex="10pt"/>
    </style:style>
    <style:style style:name="T4" style:family="text">
      <style:text-properties fo:color="#020303" loext:opacity="100%" fo:font-size="10pt" officeooo:rsid="001285fb" style:font-name-asian="Century Gothic1" style:font-size-asian="10pt" style:font-name-complex="Century Gothic1" style:font-size-complex="10pt"/>
    </style:style>
    <style:style style:name="T5" style:family="text">
      <style:text-properties fo:color="#020303" loext:opacity="100%" style:font-name="Times New Roman" fo:font-size="10pt" fo:letter-spacing="0.0028in" style:font-name-asian="Century Gothic1" style:font-size-asian="10pt" style:font-name-complex="Century Gothic1" style:font-size-complex="10pt"/>
    </style:style>
    <style:style style:name="T6" style:family="text">
      <style:text-properties fo:color="#020303" loext:opacity="100%" style:font-name="Times New Roman" fo:font-size="10pt" style:font-name-asian="Century Gothic1" style:font-size-asian="10pt" style:font-name-complex="Century Gothic1" style:font-size-complex="10pt"/>
    </style:style>
    <style:style style:name="T7" style:family="text">
      <style:text-properties fo:color="#020303" loext:opacity="100%" style:font-name="Times New Roman" fo:font-size="10pt" officeooo:rsid="001285fb" style:font-name-asian="Century Gothic1" style:font-size-asian="10pt" style:font-name-complex="Century Gothic1" style:font-size-complex="10pt"/>
    </style:style>
    <style:style style:name="T8" style:family="text">
      <style:text-properties fo:color="#020303" loext:opacity="100%" style:font-name="Times New Roman" style:font-name-asian="Century Gothic1" style:font-name-complex="Century Gothic1"/>
    </style:style>
    <style:style style:name="T9" style:family="text">
      <style:text-properties fo:color="#020303" loext:opacity="100%" style:font-name="Times New Roman" officeooo:rsid="0012a0af" style:font-name-asian="Century Gothic1" style:font-name-complex="Century Gothic1"/>
    </style:style>
    <style:style style:name="T10" style:family="text">
      <style:text-properties fo:color="#020303" loext:opacity="100%" style:font-name="Times New Roman" officeooo:rsid="001285fb" style:font-name-asian="Century Gothic1" style:font-name-complex="Century Gothic1"/>
    </style:style>
    <style:style style:name="T11" style:family="text">
      <style:text-properties fo:color="#020303" loext:opacity="100%" style:font-name="Times New Roman" fo:font-size="12pt" style:font-name-asian="Century Gothic1" style:font-size-asian="12pt" style:font-name-complex="Century Gothic1" style:font-size-complex="12pt"/>
    </style:style>
    <style:style style:name="T12" style:family="text">
      <style:text-properties fo:color="#020303" loext:opacity="100%" style:font-name="Times New Roman" fo:font-size="12pt" officeooo:rsid="00135f75" style:font-name-asian="Century Gothic1" style:font-size-asian="12pt" style:font-name-complex="Century Gothic1" style:font-size-complex="12pt"/>
    </style:style>
    <style:style style:name="T13" style:family="text">
      <style:text-properties fo:color="#020303" loext:opacity="100%" style:font-name="Times New Roman" fo:font-size="12pt" officeooo:rsid="000d54ad" style:font-name-asian="Century Gothic1" style:font-size-asian="12pt" style:font-name-complex="Century Gothic1" style:font-size-complex="12pt"/>
    </style:style>
    <style:style style:name="T14" style:family="text">
      <style:text-properties fo:color="#020303" loext:opacity="100%" style:font-name="Times New Roman" fo:font-size="12pt" officeooo:rsid="000fdc62" style:font-name-asian="Century Gothic1" style:font-size-asian="12pt" style:font-name-complex="Century Gothic1" style:font-size-complex="12pt"/>
    </style:style>
    <style:style style:name="T15" style:family="text">
      <style:text-properties fo:color="#020303" loext:opacity="100%" style:font-name="Times New Roman" fo:font-size="12pt" style:font-name-asian="Century Gothic1" style:font-size-asian="12pt" style:font-name-complex="Century Gothic1" style:font-size-complex="12pt" text:display="none"/>
    </style:style>
    <style:style style:name="T16" style:family="text">
      <style:text-properties fo:color="#020303" loext:opacity="100%" style:font-name="Times New Roman" fo:font-size="12pt" officeooo:rsid="0012a0af" style:font-name-asian="Century Gothic1" style:font-size-asian="12pt" style:font-name-complex="Century Gothic1" style:font-size-complex="12pt"/>
    </style:style>
    <style:style style:name="T17" style:family="text">
      <style:text-properties fo:color="#020303" loext:opacity="100%" style:font-name="Times New Roman" fo:font-size="12pt" officeooo:rsid="001285fb" style:font-name-asian="Century Gothic1" style:font-size-asian="12pt" style:font-name-complex="Century Gothic1" style:font-size-complex="12pt"/>
    </style:style>
    <style:style style:name="T18" style:family="text">
      <style:text-properties fo:color="#020303" loext:opacity="100%" style:font-name="Times New Roman" fo:font-size="12pt" officeooo:rsid="0013e51e" style:font-name-asian="Century Gothic1" style:font-size-asian="12pt" style:font-name-complex="Century Gothic1" style:font-size-complex="12pt"/>
    </style:style>
    <style:style style:name="T19" style:family="text">
      <style:text-properties fo:color="#020303" loext:opacity="100%" style:font-name="Times New Roman" fo:font-size="12pt" fo:letter-spacing="0.0028in" style:font-name-asian="Century Gothic1" style:font-size-asian="12pt" style:font-name-complex="Century Gothic1" style:font-size-complex="12pt"/>
    </style:style>
    <style:style style:name="T20" style:family="text">
      <style:text-properties fo:color="#020303" loext:opacity="100%" style:font-name="Times New Roman" fo:font-size="12pt" fo:letter-spacing="0.0028in" officeooo:rsid="00135f75" style:font-name-asian="Century Gothic1" style:font-size-asian="12pt" style:font-name-complex="Century Gothic1" style:font-size-complex="12pt"/>
    </style:style>
    <style:style style:name="T21" style:family="text">
      <style:text-properties fo:color="#020303" loext:opacity="100%" style:font-name="Times New Roman" fo:font-size="12pt" fo:letter-spacing="0.0028in" officeooo:rsid="000c6533" style:font-name-asian="Century Gothic1" style:font-size-asian="12pt" style:font-name-complex="Century Gothic1" style:font-size-complex="12pt"/>
    </style:style>
    <style:style style:name="T22" style:family="text">
      <style:text-properties fo:color="#020303" loext:opacity="100%" style:font-name="Times New Roman" fo:font-size="12pt" fo:font-weight="bold" style:font-name-asian="Century Gothic1" style:font-size-asian="12pt" style:font-name-complex="Century Gothic1" style:font-size-complex="12pt"/>
    </style:style>
    <style:style style:name="T23" style:family="text">
      <style:text-properties fo:color="#020303" loext:opacity="100%" style:font-name="Times New Roman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24" style:family="text">
      <style:text-properties fo:color="#020303" loext:opacity="100%" style:font-name="Times New Roman" fo:font-size="12pt" fo:font-weight="bold" officeooo:rsid="0013e51e" style:font-name-asian="Century Gothic1" style:font-size-asian="12pt" style:font-weight-asian="bold" style:font-name-complex="Century Gothic1" style:font-size-complex="12pt" style:font-weight-complex="bold"/>
    </style:style>
    <style:style style:name="T25" style:family="text">
      <style:text-properties fo:color="#020303" loext:opacity="100%" style:font-name="Times New Roman" fo:font-size="12pt" fo:font-style="italic" style:font-name-asian="Century Gothic1" style:font-size-asian="12pt" style:font-style-asian="italic" style:font-name-complex="Century Gothic1" style:font-size-complex="12pt" style:font-style-complex="italic"/>
    </style:style>
    <style:style style:name="T26" style:family="text">
      <style:text-properties fo:color="#020303" loext:opacity="100%" style:font-name="Times New Roman" fo:font-size="12pt" fo:font-style="italic" officeooo:rsid="000d54ad" style:font-name-asian="Century Gothic1" style:font-size-asian="12pt" style:font-style-asian="italic" style:font-name-complex="Century Gothic1" style:font-size-complex="12pt" style:font-style-complex="italic"/>
    </style:style>
    <style:style style:name="T27" style:family="text">
      <style:text-properties fo:color="#020303" loext:opacity="100%" style:font-name="Times New Roman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28" style:family="text">
      <style:text-properties fo:color="#020303" loext:opacity="100%" style:font-name="Times New Roman" fo:font-size="12pt" fo:font-weight="normal" officeooo:rsid="000d54ad" style:font-name-asian="Century Gothic1" style:font-size-asian="12pt" style:font-weight-asian="normal" style:font-name-complex="Century Gothic1" style:font-size-complex="12pt" style:font-weight-complex="normal"/>
    </style:style>
    <style:style style:name="T29" style:family="text">
      <style:text-properties fo:color="#020303" loext:opacity="100%" style:font-name="Times New Roman" fo:font-size="12pt" fo:font-weight="normal" officeooo:rsid="00135f75" style:font-name-asian="Century Gothic1" style:font-size-asian="12pt" style:font-weight-asian="normal" style:font-name-complex="Century Gothic1" style:font-size-complex="12pt" style:font-weight-complex="normal"/>
    </style:style>
    <style:style style:name="T30" style:family="text">
      <style:text-properties fo:color="#020303" loext:opacity="100%" style:font-name="Times New Roman" fo:font-size="12pt" fo:font-weight="normal" officeooo:rsid="000fdc62" style:font-name-asian="Century Gothic1" style:font-size-asian="12pt" style:font-weight-asian="normal" style:font-name-complex="Century Gothic1" style:font-size-complex="12pt" style:font-weight-complex="normal"/>
    </style:style>
    <style:style style:name="T31" style:family="text">
      <style:text-properties fo:color="#020303" loext:opacity="100%" style:font-name="Times New Roman" fo:font-size="12pt" fo:font-weight="normal" officeooo:rsid="0013e51e" style:font-name-asian="Century Gothic1" style:font-size-asian="12pt" style:font-weight-asian="normal" style:font-name-complex="Century Gothic1" style:font-size-complex="12pt" style:font-weight-complex="normal"/>
    </style:style>
    <style:style style:name="T32" style:family="text">
      <style:text-properties fo:color="#020303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20303" loext:opacity="100%" fo:font-size="12pt" style:font-name-asian="Century Gothic1" style:font-size-asian="12pt" style:font-name-complex="Century Gothic1" style:font-size-complex="12pt"/>
    </style:style>
    <style:style style:name="T34" style:family="text">
      <style:text-properties fo:color="#020303" loext:opacity="100%" fo:font-size="12pt" officeooo:rsid="0012a0af" style:font-name-asian="Century Gothic1" style:font-size-asian="12pt" style:font-name-complex="Century Gothic1" style:font-size-complex="12pt"/>
    </style:style>
    <style:style style:name="T35" style:family="text">
      <style:text-properties fo:color="#020303" loext:opacity="100%" style:font-name-asian="Century Gothic1" style:font-name-complex="Century Gothic1"/>
    </style:style>
    <style:style style:name="T36" style:family="text">
      <style:text-properties fo:color="#020303" loext:opacity="100%" style:font-name="Time" fo:font-size="12pt" officeooo:rsid="0012a0af" style:font-name-asian="Century Gothic1" style:font-size-asian="12pt" style:font-name-complex="Century Gothic1" style:font-size-complex="12pt"/>
    </style:style>
    <style:style style:name="T37" style:family="text">
      <style:text-properties fo:color="#020303" loext:opacity="100%" style:font-name="Time" fo:font-size="10pt" style:font-name-asian="Century Gothic1" style:font-size-asian="10pt" style:font-name-complex="Century Gothic1" style:font-size-complex="10pt"/>
    </style:style>
    <style:style style:name="T38" style:family="text">
      <style:text-properties style:font-name="Century Gothic1" style:font-name-asian="Century Gothic1" style:font-name-complex="Century Gothic1"/>
    </style:style>
    <style:style style:name="T39" style:family="text">
      <style:text-properties fo:color="#000080" loext:opacity="100%" style:font-name="Times New Roman" fo:font-size="12pt" fo:letter-spacing="0.0028in" style:font-name-asian="Century Gothic1" style:font-size-asian="12pt" style:font-name-complex="Century Gothic1" style:font-size-complex="12pt"/>
    </style:style>
    <style:style style:name="T40" style:family="text">
      <style:text-properties fo:color="#000080" loext:opacity="100%" fo:letter-spacing="0.0028in" officeooo:rsid="000e00ac" style:font-name-asian="Century Gothic1" style:font-name-complex="Century Gothic1"/>
    </style:style>
    <style:style style:name="T41" style:family="text">
      <style:text-properties fo:color="#ffffff" loext:opacity="100%" fo:font-size="1pt" style:font-size-asian="1pt"/>
    </style:style>
    <style:style style:name="T42" style:family="text">
      <style:text-properties fo:color="#ffffff" loext:opacity="100%" style:font-name="Times New Roman" fo:font-size="12pt" style:font-size-asian="12pt" style:font-size-complex="12pt"/>
    </style:style>
    <style:style style:name="T43" style:family="text">
      <style:text-properties fo:text-transform="uppercase" fo:color="#020303" loext:opacity="100%" style:font-name="Times New Roman" fo:font-size="12pt" style:font-name-asian="Century Gothic1" style:font-size-asian="12pt" style:font-name-complex="Century Gothic1" style:font-size-complex="12pt"/>
    </style:style>
    <style:style style:name="T44" style:family="text">
      <style:text-properties fo:text-transform="uppercase" fo:color="#020303" loext:opacity="100%" style:font-name="Times New Roman" fo:font-size="12pt" officeooo:rsid="000d54ad" style:font-name-asian="Century Gothic1" style:font-size-asian="12pt" style:font-name-complex="Century Gothic1" style:font-size-complex="12pt"/>
    </style:style>
    <style:style style:name="T45" style:family="text">
      <style:text-properties fo:font-weight="bold"/>
    </style:style>
    <style:style style:name="T46" style:family="text">
      <style:text-properties style:font-name="Times New Roman" fo:letter-spacing="0.0028in" style:font-name-asian="Century Gothic1" style:font-name-complex="Century Gothic1"/>
    </style:style>
    <style:style style:name="T47" style:family="text">
      <style:text-properties style:font-name="Times New Roman" style:font-name-asian="Century Gothic1" style:font-name-complex="Century Gothic1"/>
    </style:style>
    <style:style style:name="T48" style:family="text">
      <style:text-properties style:font-name="Times New Roman" fo:font-size="12pt" style:font-name-asian="Century Gothic1" style:font-size-asian="12pt" style:font-name-complex="Century Gothic1" style:font-size-complex="12pt"/>
    </style:style>
    <style:style style:name="T49" style:family="text">
      <style:text-properties style:font-name-asian="Century Gothic1" style:font-name-complex="Century Gothic1"/>
    </style:style>
    <style:style style:name="T50" style:family="text">
      <style:text-properties fo:font-size="12pt" style:font-name-asian="Century Gothic1" style:font-size-asian="12pt" style:font-name-complex="Century Gothic1" style:font-size-complex="12pt"/>
    </style:style>
    <style:style style:name="T51" style:family="text">
      <style:text-properties style:font-name="Time" style:font-name-asian="Century Gothic1" style:font-name-complex="Century Gothic1"/>
    </style:style>
    <style:style style:name="T52" style:family="text">
      <style:text-properties fo:font-variant="normal" fo:text-transform="none" fo:color="#212529" loext:opacity="100%" style:font-name="apple-system" fo:font-size="10.5pt" fo:letter-spacing="normal" fo:font-style="normal" fo:font-weight="normal" officeooo:rsid="001285fb" style:font-name-asian="Century Gothic1" style:font-size-asian="12pt" style:font-name-complex="Century Gothic1" style:font-size-complex="12pt"/>
    </style:style>
    <style:style style:name="T53" style:family="text">
      <style:text-properties fo:font-variant="normal" fo:text-transform="none" fo:color="#212529" loext:opacity="100%" style:font-name="apple-system" fo:font-size="10.5pt" fo:letter-spacing="normal" fo:font-style="normal" fo:font-weight="normal" officeooo:rsid="001285fb" style:font-name-asian="Century Gothic1" style:font-size-asian="12pt" style:font-name-complex="Century Gothic1" style:font-size-complex="12pt" loext:padding="0in" loext:border="none"/>
    </style:style>
    <style:style style:name="T54" style:family="text">
      <style:text-properties fo:font-variant="normal" fo:text-transform="none" fo:color="#212529" loext:opacity="100%" fo:letter-spacing="normal" fo:font-style="normal" fo:font-weight="bold" loext:padding="0in" loext:border="none"/>
    </style:style>
    <style:style style:name="T55" style:family="text">
      <style:text-properties fo:font-variant="normal" fo:text-transform="none" fo:color="#212529" loext:opacity="100%" fo:letter-spacing="normal" fo:font-style="normal" fo:font-weight="normal" loext:padding="0in" loext:border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02in" svg:stroke-color="#34393e" svg:stroke-opacity="100%" draw:stroke-linejoin="round" draw:fill="none" fo:padding-top="-0.0083in" fo:padding-bottom="-0.0083in" fo:padding-left="-0.0083in" fo:padding-right="-0.00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5"><draw:frame draw:style-name="fr2" draw:name="Picture 1" text:anchor-type="as-char" svg:y="0in" svg:width="1.9071in" style:rel-width="scale" svg:height="2.3902in" style:rel-height="scale" draw:z-index="0"><draw:image xlink:href="Pictures/10000000000001240000016E5D4AF88A.jpg" xlink:type="simple" xlink:show="embed" xlink:actuate="onLoad" draw:mime-type="image/jpeg"/></draw:frame></text:span></text:span></text:p>
          </table:table-cell>
          <table:table-cell table:style-name="Table1.A1" office:value-type="string">
            <text:p text:style-name="P35"><text:span text:style-name="span"><text:span text:style-name="T46">Paschal</text:span></text:span><text:span text:style-name="document_5f_right-box"><text:span text:style-name="T47"> </text:span></text:span><text:span text:style-name="span"><text:span text:style-name="T46">Joseph</text:span>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A"/>
              <table:table-row>
                <table:table-cell table:style-name="Table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 table:style-name="Table3.1">
                      <table:table-cell table:style-name="Table3.A1" office:value-type="string">
                        <text:p text:style-name="P18"><text:span text:style-name="document_5f_right-box"><text:span text:style-name="T12">Address:</text:span></text:span></text:p>
                      </table:table-cell>
                      <table:table-cell table:style-name="Table3.B1" office:value-type="string">
                        <text:p text:style-name="P17"><text:span text:style-name="span"><text:span text:style-name="T19">33206, Mwanza Tanzania</text:span>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18"><text:span text:style-name="document_5f_iconRow_5f_icoTxt"><text:span text:style-name="T20">Phone:</text:span></text:span></text:p>
                      </table:table-cell>
                      <table:table-cell table:style-name="Table3.B2" office:value-type="string">
                        <text:p text:style-name="P17"><text:span text:style-name="span"><text:span text:style-name="T19">+255 615 615 617.</text:span></text:span></text:p>
                        <text:p text:style-name="P19"><text:span text:style-name="span"><text:span text:style-name="T21">+255 655 509 008.</text:span>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18"><text:span text:style-name="document_5f_iconRow_5f_icoTxt"><text:span text:style-name="T20">Email:</text:span></text:span></text:p>
                      </table:table-cell>
                      <table:table-cell table:style-name="Table3.B3" office:value-type="string">
                        <text:p text:style-name="P17"><text:a xlink:type="simple" xlink:href="mailto:paschaltimoth@gmx.us" text:style-name="Internet_20_link" text:visited-style-name="Visited_20_Internet_20_Link"><text:span text:style-name="span"><text:span text:style-name="T39">paschaltimoth@gmx.us</text:span></text:span></text:a><text:span text:style-name="span"><text:span text:style-name="T19"> </text:span></text:span></text:p>
                      </table:table-cell>
                    </table:table-row>
                  </table:table>
                  <text:p text:style-name="P16"/>
                </table:table-cell>
                <table:table-cell table:style-name="Table2.B1" office:value-type="string">
                  <text:p text:style-name="P16"/>
                </table:table-cell>
                <table:table-cell table:style-name="Table2.A1" office:value-type="string">
                  <text:p text:style-name="P34"/>
                </table:table-cell>
              </table:table-row>
            </table:table>
            <text:p text:style-name="P13"/>
            <text:p text:style-name="P13">Systems Architect &amp; Cross-Platform Developer | Rust &amp; Kotlin Specialis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draw:frame draw:style-name="fr1" draw:name="Picture 100009" text:anchor-type="paragraph" svg:x="-0.0138in" svg:y="-0.0555in" svg:width="1.6791in" style:rel-width="scale" svg:height="0.0563in" style:rel-height="scale" draw:z-index="1"><draw:image xlink:href="Pictures/100000000000064800000042C9D391FE.png" xlink:type="simple" xlink:show="embed" xlink:actuate="onLoad" draw:mime-type="image/png"/></draw:frame><draw:connector text:anchor-type="paragraph" draw:z-index="2" draw:name="Line 9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Summary</text:span></text:span></text:p>
            <text:p text:style-name="P4"/>
          </table:table-cell>
          <table:table-cell table:style-name="Table4.B1" office:value-type="string">
            <text:p text:style-name="P45"><text:span text:style-name="parentContainer_5f_sectiontable_5f_sectionbody"><text:span text:style-name="T11">Systems-focused Software Architect and Developer with expertise in </text:span></text:span><text:span text:style-name="parentContainer_5f_sectiontable_5f_sectionbody"><text:span text:style-name="T22">Rust</text:span></text:span><text:span text:style-name="parentContainer_5f_sectiontable_5f_sectionbody"><text:span text:style-name="T11"> and </text:span></text:span><text:span text:style-name="parentContainer_5f_sectiontable_5f_sectionbody"><text:span text:style-name="T22">Kotlin Multiplatform</text:span></text:span><text:span text:style-name="parentContainer_5f_sectiontable_5f_sectionbody"><text:span text:style-name="T11">. Specialized in building high-performance backend architectures, telemetry systems, and hardware-to-software integrations. Currently bridging deep systems logic with intuitive </text:span></text:span><text:span text:style-name="parentContainer_5f_sectiontable_5f_sectionbody"><text:span text:style-name="T22">[UI|UX]</text:span></text:span><text:span text:style-name="parentContainer_5f_sectiontable_5f_sectionbody"><text:span text:style-name="T11"> design to create accessible, cross-platform technical tools.</text:span>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<draw:frame draw:style-name="fr1" draw:name="Picture 100011" text:anchor-type="paragraph" svg:x="-0.0138in" svg:y="-0.0555in" svg:width="1.6791in" style:rel-width="scale" svg:height="0.0563in" style:rel-height="scale" draw:z-index="3"><draw:image xlink:href="Pictures/100000000000064800000042C9D391FE.png" xlink:type="simple" xlink:show="embed" xlink:actuate="onLoad" draw:mime-type="image/png"/></draw:frame><draw:connector text:anchor-type="paragraph" draw:z-index="4" draw:name="Line 2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Skills</text:span></text:span></text:p>
            <text:p text:style-name="P4"/>
          </table:table-cell>
          <table:table-cell table:style-name="Table5.B1" office:value-type="string">
            <table:table table:name="Table6" table:style-name="Table6">
              <table:table-column table:style-name="Table6.A" table:number-columns-repeated="2"/>
              <table:table-row table:style-name="Table6.1">
                <table:table-cell table:style-name="Table6.A1" office:value-type="string">
                  <text:list text:style-name="L1">
                    <text:list-item>
                      <text:p text:style-name="P41"><text:span text:style-name="document_5f_skill_5f_paddedline1"><text:span text:style-name="T11">Database design and development</text:span></text:span></text:p>
                    </text:list-item>
                    <text:list-item>
                      <text:p text:style-name="P41"><text:span text:style-name="document_5f_skill_5f_paddedline1"><text:span text:style-name="T11">Backend Developer</text:span></text:span></text:p>
                    </text:list-item>
                    <text:list-item>
                      <text:p text:style-name="P41"><text:span text:style-name="document_5f_skill_5f_paddedline1"><text:span text:style-name="T11">User training and support</text:span></text:span></text:p>
                    </text:list-item>
                    <text:list-item>
                      <text:p text:style-name="P41"><text:span text:style-name="document_5f_skill_5f_paddedline1"><text:span text:style-name="T11">Technical troubleshooting</text:span></text:span></text:p>
                    </text:list-item>
                    <text:list-item>
                      <text:p text:style-name="P41"><text:span text:style-name="document_5f_skill_5f_paddedline1"><text:span text:style-name="T11">Research and documentation</text:span></text:span></text:p>
                    </text:list-item>
                    <text:list-item>
                      <text:p text:style-name="P41"><text:span text:style-name="document_5f_skill_5f_paddedline1"><text:span text:style-name="T11">Effective communication</text:span></text:span></text:p>
                    </text:list-item>
                    <text:list-item>
                      <text:p text:style-name="P41"><text:span text:style-name="document_5f_skill_5f_paddedline1"><text:span text:style-name="T11">Team collaboration</text:span></text:span></text:p>
                    </text:list-item>
                    <text:list-item>
                      <text:p text:style-name="P41"><text:span text:style-name="document_5f_skill_5f_paddedline1"><text:span text:style-name="T11">English proficiency</text:span></text:span></text:p>
                    </text:list-item>
                    <text:list-item>
                      <text:p text:style-name="P41"><text:span text:style-name="document_5f_skill_5f_paddedline1"><text:span text:style-name="T22">Specialized Expertise:</text:span></text:span><text:span text:style-name="document_5f_skill_5f_paddedline1"><text:span text:style-name="T11"> Hardware Integration (Serial/UART), Telemetry Systems, Distributed Systems Research (Clustering), and Block-based Coding (Blockly).</text:span></text:span></text:p>
                    </text:list-item>
                  </text:list>
                  <text:p text:style-name="P5"/>
                </table:table-cell>
                <table:table-cell table:style-name="Table6.B1" office:value-type="string">
                  <text:list text:style-name="L2">
                    <text:list-item>
                      <text:p text:style-name="P42"><text:span text:style-name="document_5f_skill_5f_paddedline1"><text:span text:style-name="T11">Basic Russian skills</text:span></text:span></text:p>
                    </text:list-item>
                    <text:list-item>
                      <text:p text:style-name="P42"><text:span text:style-name="document_5f_skill_5f_paddedline1"><text:span text:style-name="T11">Presentation delivery</text:span></text:span></text:p>
                    </text:list-item>
                    <text:list-item>
                      <text:p text:style-name="P42"><text:span text:style-name="document_5f_skill_5f_paddedline1"><text:span text:style-name="T11">SQL and database management</text:span></text:span></text:p>
                    </text:list-item>
                    <text:list-item>
                      <text:p text:style-name="P42"><text:span text:style-name="document_5f_skill_5f_paddedline1"><text:span text:style-name="T11">Software development lifecycle</text:span></text:span></text:p>
                    </text:list-item>
                    <text:list-item>
                      <text:p text:style-name="P42"><text:span text:style-name="document_5f_skill_5f_paddedline1"><text:span text:style-name="T11">IT Infrastructure Troubleshooting.</text:span></text:span></text:p>
                    </text:list-item>
                    <text:list-item>
                      <text:p text:style-name="P42"><text:span text:style-name="document_5f_skill_5f_paddedline1"><text:span text:style-name="T11">Problem-solving skills</text:span></text:span></text:p>
                    </text:list-item>
                    <text:list-item>
                      <text:p text:style-name="P27"><text:span text:style-name="document_5f_skill_5f_paddedline1"><text:span text:style-name="T22">Systems &amp; Languages:</text:span></text:span><text:span text:style-name="document_5f_skill_5f_paddedline1"><text:span text:style-name="T11"> Rust (Core Logic), Kotlin Multiplatform (KMP), Python, Java, SQL.</text:span></text:span></text:p>
                    </text:list-item>
                    <text:list-item>
                      <text:p text:style-name="P42"><text:span text:style-name="document_5f_skill_5f_paddedline1"><text:span text:style-name="T11">Attention to detail.</text:span></text:span></text:p>
                    </text:list-item>
                    <text:list-item>
                      <text:p text:style-name="P27"><text:span text:style-name="document_5f_skill_5f_paddedline1"><text:span text:style-name="T22">Environment:</text:span></text:span><text:span text:style-name="document_5f_skill_5f_paddedline1"><text:span text:style-name="T11"> Linux Power User, Android Studio, VS Code.</text:span></text:span></text:p>
                    </text:list-item>
                  </text:list>
                  <text:p text:style-name="P5"/>
                </table:table-cell>
              </table:table-row>
            </table:table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<draw:frame draw:style-name="fr1" draw:name="Picture 100013" text:anchor-type="paragraph" svg:x="-0.0138in" svg:y="-0.0555in" svg:width="1.6791in" style:rel-width="scale" svg:height="0.0563in" style:rel-height="scale" draw:z-index="5"><draw:image xlink:href="Pictures/100000000000064800000042C9D391FE.png" xlink:type="simple" xlink:show="embed" xlink:actuate="onLoad" draw:mime-type="image/png"/></draw:frame><draw:connector text:anchor-type="paragraph" draw:z-index="6" draw:name="Line 3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Experience</text:span></text:span></text:p>
            <text:p text:style-name="P4"/>
          </table:table-cell>
          <table:table-cell table:style-name="Table7.B1" office:value-type="string">
            <text:p text:style-name="P6"><text:span text:style-name="document_5f_txtBold"><text:span text:style-name="T44">Software developer</text:span></text:span><text:span text:style-name="span"><text:span text:style-name="T11">, 0</text:span></text:span><text:span text:style-name="span"><text:span text:style-name="T13">9</text:span></text:span><text:span text:style-name="span"><text:span text:style-name="T11">/2025</text:span></text:span><text:span text:style-name="parentContainer_5f_sectiontable_5f_sectionbody"><text:span text:style-name="T11"> </text:span></text:span><text:span text:style-name="span"><text:span text:style-name="T11">-</text:span></text:span><text:span text:style-name="parentContainer_5f_sectiontable_5f_sectionbody"><text:span text:style-name="T11"> </text:span></text:span><text:span text:style-name="parentContainer_5f_sectiontable_5f_sectionbody"><text:span text:style-name="T13">current</text:span></text:span></text:p>
            <text:p text:style-name="P7"><text:span text:style-name="document_5f_txtBold"><text:span text:style-name="T26">MITz GROUP LIMITED</text:span></text:span><text:span text:style-name="span"><text:span text:style-name="T11">, </text:span></text:span><text:span text:style-name="span"><text:span text:style-name="T13">Mwanza</text:span></text:span><text:span text:style-name="span"><text:span text:style-name="T11">, Tanzania</text:span></text:span><text:span text:style-name="parentContainer_5f_sectiontable_5f_sectionbody"><text:span text:style-name="T11"> </text:span></text:span></text:p>
            <text:list text:style-name="L3">
              <text:list-item>
                <text:p text:style-name="P37"><text:span text:style-name="span"><text:span text:style-name="T28">D</text:span></text:span><text:span text:style-name="span"><text:span text:style-name="T27">e</text:span></text:span><text:span text:style-name="span"><text:span text:style-name="T28">veloped and documented software programs using Java, JavaScript, HTML, and </text:span></text:span><text:soft-page-break/><text:span text:style-name="span"><text:span text:style-name="T28">CSS</text:span></text:span><text:span text:style-name="span"><text:span text:style-name="T27">.</text:span></text:span></text:p>
              </text:list-item>
              <text:list-item>
                <text:p text:style-name="P26"><text:span text:style-name="span"><text:span text:style-name="T27">Lead Architect – Cublocks Ecosystem: Spearheading the development of CublocksV2, a cross-platform visual programming tool.</text:span></text:span></text:p>
              </text:list-item>
              <text:list-item>
                <text:p text:style-name="P37"><text:span text:style-name="span"><text:span text:style-name="T28">Analyzed user requirements to create effective technical specifications for software solutions</text:span></text:span><text:span text:style-name="span"><text:span text:style-name="T27">.</text:span></text:span></text:p>
              </text:list-item>
              <text:list-item>
                <text:p text:style-name="P26"><text:span text:style-name="span"><text:span text:style-name="T27">Core Development: Implementing high-performance core logic in Rust and transitioning the frontend to Kotlin Multiplatform for unified deployment.</text:span></text:span></text:p>
              </text:list-item>
              <text:list-item>
                <text:p text:style-name="P37"><text:span text:style-name="span"><text:span text:style-name="T27">Conducted code reviews to ensure adherence to quality standards and best practices</text:span></text:span></text:p>
              </text:list-item>
              <text:list-item>
                <text:p text:style-name="P26"><text:span text:style-name="span"><text:span text:style-name="T27">Infrastructure &amp; Security: Managing system telemetry and SSL certificate configurations for the </text:span></text:span><text:span text:style-name="span"><text:span text:style-name="T29">company</text:span></text:span><text:span text:style-name="span"><text:span text:style-name="T27"> domain infrastructure.</text:span></text:span></text:p>
              </text:list-item>
              <text:list-item>
                <text:p text:style-name="P37"><text:span text:style-name="span"><text:span text:style-name="T27">Designed databases for application data storage utilizing SQL Server and MongoDB technologies.</text:span></text:span></text:p>
              </text:list-item>
              <text:list-item>
                <text:p text:style-name="P26"><text:span text:style-name="span"><text:span text:style-name="T27">Hardware Layer: Developed reliable serial port communication protocols (</text:span></text:span><text:span text:style-name="span"><text:span text:style-name="Source_20_Text"><text:span text:style-name="T32">/dev/ttyUSB0</text:span></text:span></text:span><text:span text:style-name="span"><text:span text:style-name="T27">) for hardware-software interaction.</text:span></text:span></text:p>
              </text:list-item>
              <text:list-item>
                <text:p text:style-name="P37"><text:span text:style-name="span"><text:span text:style-name="T30">P</text:span></text:span><text:span text:style-name="span"><text:span text:style-name="T27">articipated in regular stak</text:span></text:span><text:span text:style-name="span"><text:span text:style-name="T11">eholder meetings to discuss project challenges and progress updates.</text:span></text:span></text:p>
              </text:list-item>
              <text:list-item>
                <text:p text:style-name="P37"><text:span text:style-name="span"><text:span text:style-name="T13">Utilized version control systems to enhance project management and collaboration efficiency.</text:span></text:span></text:p>
              </text:list-item>
              <text:list-item>
                <text:p text:style-name="P38"><text:span text:style-name="span"><text:span text:style-name="T14">Creating a Developing Backend Architecture for all Company Software and Web applications.</text:span></text:span></text:p>
              </text:list-item>
            </text:list>
            <text:p text:style-name="P28"/>
            <text:p text:style-name="P6"><text:span text:style-name="document_5f_txtBold"><text:span text:style-name="T43">Intern</text:span></text:span><text:span text:style-name="span"><text:span text:style-name="T11">, 07/2025</text:span></text:span><text:span text:style-name="parentContainer_5f_sectiontable_5f_sectionbody"><text:span text:style-name="T11"> </text:span></text:span><text:span text:style-name="span"><text:span text:style-name="T11">-</text:span></text:span><text:span text:style-name="parentContainer_5f_sectiontable_5f_sectionbody"><text:span text:style-name="T11"> 09/2025</text:span></text:span></text:p>
            <text:p text:style-name="P8"><text:span text:style-name="document_5f_txtBold"><text:span text:style-name="T25">Zanzibar Electricity Corporation, ZECO</text:span></text:span><text:span text:style-name="span"><text:span text:style-name="T11">, Zanzibar, Tanzania</text:span></text:span><text:span text:style-name="parentContainer_5f_sectiontable_5f_sectionbody"><text:span text:style-name="T11"> </text:span></text:span></text:p>
            <text:list text:continue-numbering="true" text:style-name="L3">
              <text:list-item>
                <text:p text:style-name="P39"><text:span text:style-name="span"><text:span text:style-name="T11">Resolved complex technical problems across multiple platforms, enhancing system reliability.</text:span></text:span></text:p>
              </text:list-item>
              <text:list-item>
                <text:p text:style-name="P39"><text:span text:style-name="span"><text:span text:style-name="T11">Delivered training sessions to end-users, boosting technology adoption and proficiency.</text:span></text:span></text:p>
              </text:list-item>
            </text:list>
            <text:p text:style-name="P29"/>
            <text:p text:style-name="P8"><text:span text:style-name="document_5f_txtBold"><text:span text:style-name="T43">Derrickman</text:span></text:span><text:span text:style-name="span"><text:span text:style-name="T11">, 07/2023</text:span></text:span><text:span text:style-name="parentContainer_5f_sectiontable_5f_sectionbody"><text:span text:style-name="T11"> </text:span></text:span><text:span text:style-name="span"><text:span text:style-name="T11">-</text:span></text:span><text:span text:style-name="parentContainer_5f_sectiontable_5f_sectionbody"><text:span text:style-name="T11"> </text:span></text:span><text:span text:style-name="span"><text:span text:style-name="T11">11/2024</text:span></text:span><text:span text:style-name="parentContainer_5f_sectiontable_5f_sectionbody"><text:span text:style-name="T11"> </text:span></text:span></text:p>
            <text:p text:style-name="P8"><text:span text:style-name="document_5f_txtBold"><text:span text:style-name="T25">GeoFields Company Limited.</text:span></text:span><text:span text:style-name="span"><text:span text:style-name="T11">, Dar es Salaam, Tanzania</text:span></text:span><text:span text:style-name="parentContainer_5f_sectiontable_5f_sectionbody"><text:span text:style-name="T11"> </text:span></text:span></text:p>
            <text:list text:style-name="L4">
              <text:list-item>
                <text:p text:style-name="P40"><text:span text:style-name="span"><text:span text:style-name="T11">Secured drill strings using specialized tools, including tongs, slips, and elevators per engineering specifications.</text:span></text:span></text:p>
              </text:list-item>
              <text:list-item>
                <text:p text:style-name="P40"><text:span text:style-name="span"><text:span text:style-name="T11">Reported drilling irregularities immediately to supervisors or engineers on rig.</text:span></text:span></text:p>
              </text:list-item>
              <text:list-item>
                <text:p text:style-name="P40"><text:soft-page-break/><text:span text:style-name="span"><text:span text:style-name="T11">Conducted daily inspections of derrick components to ensure safe operations.</text:span></text:span></text:p>
              </text:list-item>
              <text:list-item>
                <text:p text:style-name="P40"><text:span text:style-name="span"><text:span text:style-name="T11">Monitored drilling activities from derrick floor, relaying instructions to driller and crew.</text:span></text:span></text:p>
              </text:list-item>
              <text:list-item>
                <text:p text:style-name="P40"><text:span text:style-name="span"><text:span text:style-name="T11">Adjusted blocks and tackle for safe lifting of heavy objects onto derrick floor.</text:span></text:span></text:p>
              </text:list-item>
              <text:list-item>
                <text:p text:style-name="P40"><text:span text:style-name="span"><text:span text:style-name="T11">Inspected drill lines for wear, replacing damaged parts as necessary.</text:span></text:span></text:p>
              </text:list-item>
              <text:list-item>
                <text:p text:style-name="P40"><text:span text:style-name="span"><text:span text:style-name="T11">Guided crane operators with hand signals during heavy load lifts onto deck.</text:span></text:span></text:p>
              </text:list-item>
              <text:list-item>
                <text:p text:style-name="P40"><text:span text:style-name="span"><text:span text:style-name="T11">Maintained comprehensive records of all operational activities during shift for reference.</text:span></text:span></text:p>
              </text:list-item>
            </text:list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<draw:frame draw:style-name="fr1" draw:name="Picture 100015" text:anchor-type="paragraph" svg:x="-0.0138in" svg:y="-0.0555in" svg:width="1.6791in" style:rel-width="scale" svg:height="0.0563in" style:rel-height="scale" draw:z-index="7"><draw:image xlink:href="Pictures/100000000000064800000042C9D391FE.png" xlink:type="simple" xlink:show="embed" xlink:actuate="onLoad" draw:mime-type="image/png"/></draw:frame><draw:connector text:anchor-type="paragraph" draw:z-index="8" draw:name="Line 4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Education and Training</text:span></text:span></text:p>
            <text:p text:style-name="P4"/>
          </table:table-cell>
          <table:table-cell table:style-name="Table8.B1" office:value-type="string">
            <text:p text:style-name="P9"><text:span text:style-name="parentContainer_5f_sectiontable_5f_sectionbody"><text:span text:style-name="T11"> </text:span></text:span></text:p>
            <text:p text:style-name="P11"><text:span text:style-name="document_5f_txtBold"><text:span text:style-name="T11">AbdulRahmn Al-Sumait University</text:span></text:span><text:span text:style-name="span"><text:span text:style-name="T11">, Zanzibar, Tanzania, Expected in 12/2025</text:span></text:span><text:span text:style-name="parentContainer_5f_sectiontable_5f_sectionbody"><text:span text:style-name="T11"> </text:span></text:span></text:p>
            <text:p text:style-name="P31"><text:span text:style-name="document_5f_txtBold"><text:span text:style-name="T11">Bachelor of Science</text:span></text:span><text:span text:style-name="document_5f_beforecolonspace"><text:span text:style-name="T11"> </text:span></text:span><text:span text:style-name="span"><text:span text:style-name="T11">: </text:span></text:span><text:span text:style-name="document_5f_txtBold"><text:span text:style-name="T11">Information Technology</text:span></text:span><text:span text:style-name="parentContainer_5f_sectiontable_5f_sectionbody"><text:span text:style-name="T11"> </text:span></text:span></text:p>
            <text:p text:style-name="P10"><text:span text:style-name="parentContainer_5f_sectiontable_5f_sectionbody"><text:span text:style-name="T11"> </text:span></text:span></text:p>
            <text:p text:style-name="P30"/>
            <text:p text:style-name="P11"><text:span text:style-name="document_5f_txtBold"><text:span text:style-name="T11">Ngudu High School</text:span></text:span><text:span text:style-name="span"><text:span text:style-name="T11">, Mwanza, Tanzania, 07/2022</text:span></text:span><text:span text:style-name="parentContainer_5f_sectiontable_5f_sectionbody"><text:span text:style-name="T11"> </text:span></text:span></text:p>
            <text:p text:style-name="P31"><text:span text:style-name="document_5f_txtBold"><text:span text:style-name="T11">High School Diploma</text:span></text:span><text:span text:style-name="parentContainer_5f_sectiontable_5f_sectionbody"><text:span text:style-name="T11"> </text:span></text:span></text:p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"><draw:frame draw:style-name="fr1" draw:name="Picture 100017" text:anchor-type="paragraph" svg:x="-0.0138in" svg:y="-0.0555in" svg:width="1.6791in" style:rel-width="scale" svg:height="0.0563in" style:rel-height="scale" draw:z-index="9"><draw:image xlink:href="Pictures/100000000000064800000042C9D391FE.png" xlink:type="simple" xlink:show="embed" xlink:actuate="onLoad" draw:mime-type="image/png"/></draw:frame><draw:connector text:anchor-type="paragraph" draw:z-index="10" draw:name="Line 5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Accomplishments</text:span></text:span></text:p>
            <text:p text:style-name="P4"/>
          </table:table-cell>
          <table:table-cell table:style-name="Table9.B1" office:value-type="string">
            <text:list text:style-name="L5">
              <text:list-item>
                <text:p text:style-name="P43"><text:span text:style-name="parentContainer_5f_sectiontable_5f_sectionbody"><text:span text:style-name="T11">Collaborated on an Unreal Engine project with Epic Games developers.</text:span></text:span></text:p>
              </text:list-item>
            </text:list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"><draw:frame draw:style-name="fr1" draw:name="Picture 100019" text:anchor-type="paragraph" svg:x="-0.0138in" svg:y="-0.0555in" svg:width="1.6791in" style:rel-width="scale" svg:height="0.0563in" style:rel-height="scale" draw:z-index="11"><draw:image xlink:href="Pictures/100000000000064800000042C9D391FE.png" xlink:type="simple" xlink:show="embed" xlink:actuate="onLoad" draw:mime-type="image/png"/></draw:frame><draw:connector text:anchor-type="paragraph" draw:z-index="12" draw:name="Line 6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Languages</text:span></text:span></text:p>
            <text:p text:style-name="P4"/>
          </table:table-cell>
          <table:table-cell table:style-name="Table10.B1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A"/>
              <table:table-row>
                <table:table-cell table:style-name="Table11.A1" table:number-columns-spanned="3" office:value-type="string">
                  <text:p text:style-name="P31"><text:span text:style-name="document_5f_langSec_5f_paragraph_5f_nativeLangPara_5f_field"><text:span text:style-name="T11"/></text:span></text:p>
                </table:table-cell>
                <table:covered-table-cell/>
                <table:covered-table-cell/>
              </table:table-row>
              <table:table-row table:style-name="Table11.2">
                <table:table-cell table:style-name="Table11.A2" office:value-type="string">
                  <text:p text:style-name="P32"><text:span text:style-name="document_5f_langSec_5f_infobarsec_5f_field_5f_nth-child_28_1_29__20__3e__20_span_5f_nth-child_28_1_29_"><text:span text:style-name="T11">Swahili</text:span></text:span><text:span text:style-name="document_5f_beforecolonspace"><text:span text:style-name="T23"> </text:span></text:span><text:span text:style-name="span"><text:span text:style-name="T23">:</text:span></text:span><text:span text:style-name="document_5f_langSec_5f_paragraph_5f_nativeLangPara_5f_field"><text:span text:style-name="T11"> </text:span></text:span><text:span text:style-name="span"><text:span text:style-name="T11">First Language</text:span></text:span><text:span text:style-name="document_5f_beforecolonspace"><text:span text:style-name="T11"> </text:span></text:span><text:span text:style-name="span"><text:span text:style-name="T15">:</text:span></text:span><text:span text:style-name="document_5f_langSec_5f_paragraph_5f_nativeLangPara_5f_field"><text:span text:style-name="T15">.</text:span></text:span></text:p>
                  <text:p text:style-name="P32"><text:span text:style-name="document_5f_langSec_5f_paragraph_5f_nativeLangPara_5f_field"><text:span text:style-name="T15"/></text:span></text:p>
                  <text:p text:style-name="P33"><text:span text:style-name="document_5f_langSec_5f_infobarsec_5f_field_5f_nth-child_28_1_29__20__3e__20_span_5f_nth-child_28_1_29_"><text:span text:style-name="T11">English</text:span></text:span><text:span text:style-name="document_5f_beforecolonspace"><text:span text:style-name="T23"> </text:span></text:span><text:span text:style-name="span"><text:span text:style-name="T23">:</text:span></text:span><text:span text:style-name="document_5f_langSec_5f_paragraph_5f_nativeLangPara_5f_field"><text:span text:style-name="T11"> </text:span></text:span><text:span text:style-name="span"><text:span text:style-name="T11"><text:tab/></text:span></text:span><text:span text:style-name="document_5f_langSec_5f_paragraph_5f_nativeLangPara_5f_field"><text:span text:style-name="T11"> </text:span></text:span></text:p>
                  <text:p text:style-name="P46"><text:span text:style-name="span"><text:span text:style-name="T11">Upper Intermediate.</text:span></text:span></text:p>
                </table:table-cell>
                <table:table-cell table:style-name="Table11.B2" office:value-type="string">
                  <text:p text:style-name="P14"/>
                </table:table-cell>
                <table:table-cell table:style-name="Table11.A2" office:value-type="string">
                  <text:p text:style-name="P47"><text:span text:style-name="document_5f_langSec_5f_paragraph_5f_nativeLangPara_5f_field"><text:span text:style-name="T24">Russian:</text:span></text:span></text:p>
                  <text:p text:style-name="P47"><text:span text:style-name="document_5f_langSec_5f_paragraph_5f_nativeLangPara_5f_field"><text:span text:style-name="T31">Beginner.</text:span></text:span></text:p>
                </table:table-cell>
              </table:table-row>
            </table:table>
            <text:p text:style-name="P15"/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7"><draw:frame draw:style-name="fr1" draw:name="Picture 100025" text:anchor-type="paragraph" svg:x="-0.0138in" svg:y="-0.0555in" svg:width="1.6791in" style:rel-width="scale" svg:height="0.0563in" style:rel-height="scale" draw:z-index="13"><draw:image xlink:href="Pictures/100000000000064800000042C9D391FE.png" xlink:type="simple" xlink:show="embed" xlink:actuate="onLoad" draw:mime-type="image/png"/></draw:frame><draw:connector text:anchor-type="paragraph" draw:z-index="14" draw:name="Line 7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Activities.</text:span></text:span></text:p>
            <text:p text:style-name="P4"/>
          </table:table-cell>
          <table:table-cell table:style-name="Table12.B1" office:value-type="string">
            <text:list text:style-name="L6">
              <text:list-item>
                <text:p text:style-name="P44"><text:span text:style-name="parentContainer_5f_sectiontable_5f_sectionbody"><text:span text:style-name="T16">Swimming and Reading Books.</text:span></text:span></text:p>
              </text:list-item>
            </text:list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7"><draw:frame draw:style-name="fr1" draw:name="Picture 100027" text:anchor-type="paragraph" svg:x="-0.0138in" svg:y="-0.0555in" svg:width="1.6791in" style:rel-width="scale" svg:height="0.0563in" style:rel-height="scale" draw:z-index="15"><draw:image xlink:href="Pictures/100000000000064800000042C9D391FE.png" xlink:type="simple" xlink:show="embed" xlink:actuate="onLoad" draw:mime-type="image/png"/></draw:frame><draw:connector text:anchor-type="paragraph" draw:z-index="16" draw:name="Line 8" draw:style-name="gr1" draw:text-style-name="P48" draw:type="line" svg:x1="0in" svg:y1="-0.0071in" svg:x2="7.6665in" svg:y2="0in" svg:d="M0-18l19473 18" svg:viewBox="0 0 19475 19"><text:p/></draw:connector><text:span text:style-name="parentContainer_5f_sectiontable_5f_heading"><text:span text:style-name="T11"><text:s/></text:span></text:span></text:p>
            <text:p text:style-name="P36"><text:span text:style-name="parentContainer_5f_sectiontable_5f_heading"><text:span text:style-name="T48">References</text:span></text:span></text:p>
            <text:p text:style-name="P4"/>
          </table:table-cell>
          <table:table-cell table:style-name="Table13.B1" office:value-type="string">
            <text:p text:style-name="P20"><text:bookmark text:name="ContentPlaceHolder1_lvReference_lbllvItemName_0"/><text:span text:style-name="T45">Name:</text:span><text:line-break/><text:bookmark text:name="ContentPlaceHolder1_lvReference_objlbllvName_0"/>Dr. Antar S.H. Abdul-Qawy</text:p>
            <text:p text:style-name="P21"><text:bookmark text:name="ContentPlaceHolder1_lvReference_lbllvItemPosition_0"/><text:span text:style-name="T45">Position:</text:span><text:line-break/><text:bookmark text:name="ContentPlaceHolder1_lvReference_objlbllvPosition_0"/>Dean of Faculty of Science</text:p>
            <text:p text:style-name="P21"><text:bookmark text:name="ContentPlaceHolder1_lvReference_lblItemRefType_0"/><text:soft-page-break/><text:span text:style-name="T45">Ref. Type:</text:span><text:line-break/><text:bookmark text:name="ContentPlaceHolder1_lvReference_objlbllvRefType_0"/>Professional</text:p>
            <text:p text:style-name="P21"><text:bookmark text:name="ContentPlaceHolder1_lvReference_lblItemCountry_0"/><text:span text:style-name="T45">Country:</text:span><text:line-break/><text:bookmark text:name="ContentPlaceHolder1_lvReference_objlbllvCountry_0"/>Tanzania</text:p>
            <text:p text:style-name="P22"><text:bookmark text:name="ContentPlaceHolder1_lvReference_lblItemState_0"/>State/Province:<text:bookmark text:name="ContentPlaceHolder1_lvReference_objlbllvState_0"/></text:p>
            <text:p text:style-name="P21"><text:bookmark text:name="ContentPlaceHolder1_lvReference_lblItemGender_0"/><text:span text:style-name="T45">Gender:</text:span><text:line-break/><text:bookmark text:name="ContentPlaceHolder1_lvReference_objlbllvGender_0"/>Male</text:p>
            <text:p text:style-name="P21"><text:bookmark text:name="ContentPlaceHolder1_lvReference_lblItemMobile_0"/><text:span text:style-name="T45">Mobile:</text:span><text:line-break/><text:bookmark text:name="ContentPlaceHolder1_lvReference_objlbllvMobile_0"/>+255-776438887</text:p>
            <text:p text:style-name="P21"><text:bookmark text:name="ContentPlaceHolder1_lvReference_lblItemTelNo_0"/><text:span text:style-name="T45">Tel. No.:</text:span><text:line-break/><text:bookmark text:name="ContentPlaceHolder1_lvReference_objlbllvTelNo_0"/>SUMAIT UNIVERSITY</text:p>
            <text:p text:style-name="P21"><text:bookmark text:name="ContentPlaceHolder1_lvReference_lblItemEmail_0"/><text:span text:style-name="T45">Email:</text:span><text:line-break/><text:bookmark text:name="ContentPlaceHolder1_lvReference_objlbllvEmail_0"/>antarabdulqawy@sumait.ac.tz</text:p>
            <text:p text:style-name="P21"><text:bookmark text:name="ContentPlaceHolder1_lvReference_lblItemAddress_0"/><text:span text:style-name="T45">Address:</text:span><text:line-break/><text:bookmark text:name="ContentPlaceHolder1_lvReference_objlbllvAddress_0"/>Chukwan, Zanzibar</text:p>
            <text:p text:style-name="P12"><text:bookmark text:name="ContentPlaceHolder1_lvReference_objlvbtnedit_0"/><text:bookmark text:name="ContentPlaceHolder1_lvReference_objbtndelete_0"/></text:p>
            <text:p text:style-name="P23"><text:bookmark text:name="ContentPlaceHolder1_lvReference_lbllvItemName_1"/><text:span text:style-name="T45">Name:</text:span><text:line-break/><text:bookmark text:name="ContentPlaceHolder1_lvReference_objlbllvName_1"/>Mr. Abdulhamid Ahmed Ali</text:p>
            <text:p text:style-name="P23"><text:bookmark text:name="ContentPlaceHolder1_lvReference_lbllvItemPosition_1"/><text:span text:style-name="T45">Position:</text:span><text:line-break/><text:bookmark text:name="ContentPlaceHolder1_lvReference_objlbllvPosition_1"/>LECTURER</text:p>
            <text:p text:style-name="P23"><text:bookmark text:name="ContentPlaceHolder1_lvReference_lblItemRefType_1"/><text:span text:style-name="T45">Ref. Type:</text:span><text:line-break/><text:bookmark text:name="ContentPlaceHolder1_lvReference_objlbllvRefType_1"/>Professional</text:p>
            <text:p text:style-name="P23"><text:bookmark text:name="ContentPlaceHolder1_lvReference_lblItemCountry_1"/><text:span text:style-name="T45">Country:</text:span><text:line-break/><text:bookmark text:name="ContentPlaceHolder1_lvReference_objlbllvCountry_1"/>Tanzania</text:p>
            <text:p text:style-name="P24"><text:bookmark text:name="ContentPlaceHolder1_lvReference_lblItemState_1"/>State/Province:<text:bookmark text:name="ContentPlaceHolder1_lvReference_objlbllvState_1"/></text:p>
            <text:p text:style-name="P23"><text:bookmark text:name="ContentPlaceHolder1_lvReference_lblItemGender_1"/><text:span text:style-name="T45">Gender:</text:span><text:line-break/><text:bookmark text:name="ContentPlaceHolder1_lvReference_objlbllvGender_1"/>Male</text:p>
            <text:p text:style-name="P23"><text:bookmark text:name="ContentPlaceHolder1_lvReference_lblItemMobile_1"/><text:span text:style-name="T45">Mobile:</text:span><text:line-break/><text:bookmark text:name="ContentPlaceHolder1_lvReference_objlbllvMobile_1"/>+255629816407</text:p>
            <text:p text:style-name="P23"><text:bookmark text:name="ContentPlaceHolder1_lvReference_lblItemTelNo_1"/><text:span text:style-name="T45">Tel. No.:</text:span><text:line-break/><text:bookmark text:name="ContentPlaceHolder1_lvReference_objlbllvTelNo_1"/>SUMAIT UNIVERSITY</text:p>
            <text:p text:style-name="P23"><text:bookmark text:name="ContentPlaceHolder1_lvReference_lblItemEmail_1"/><text:span text:style-name="T45">Email:</text:span><text:line-break/><text:bookmark text:name="ContentPlaceHolder1_lvReference_objlbllvEmail_1"/>hamid@sumait.ac.tz</text:p>
            <text:p text:style-name="P25"><text:bookmark text:name="ContentPlaceHolder1_lvReference_lblItemAddress_1"/><text:span text:style-name="T54">Address:</text:span><text:span text:style-name="T55"><text:line-break/></text:span><text:bookmark text:name="ContentPlaceHolder1_lvReference_objlbllvAddress_1"/><text:span text:style-name="T55">Chukwani</text:span></text:p>
          </table:table-cell>
        </table:table-row>
      </table:table>
      <text:p text:style-name="P2"><text:span text:style-name="Default_20_Paragraph_20_Font"><text:span text:style-name="T41">#HRJ#786c7fd4-e568-4da6-85f0-505565951c25#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Courier New" svg:font-family="'Courier New'" style:font-family-generic="modern" style:font-pitch="fixed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draw:stroke="solid" svg:stroke-width="0.028in" svg:stroke-color="#1c334e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0pt" fo:letter-spacing="normal" fo:language="en" fo:country="US" fo:font-style="normal" style:text-underline-style="none" fo:font-weight="normal" style:letter-kerning="fals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0pt" fo:letter-spacing="normal" fo:language="en" fo:country="US" fo:font-style="normal" style:text-underline-style="none" fo:font-weight="normal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fo:font-size="24pt" fo:font-weight="bold" style:letter-kerning="true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weight="bold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style:line-height-at-least="0.1665in" fo:hyphenation-ladder-count="no-limit" style:vertical-align="baselin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document_5f_fontsize" style:display-name="document_fontsize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document_5f_left-box_20__3e__20_section_5f_nth-child_28_1_29_" style:display-name="document_left-box &gt; section_nth-child(1)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paragraph_5f_firstparagraph" style:display-name="document_paragraph_first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PICTPic" style:display-name="document_PICTPic" style:family="paragraph" style:parent-style-name="Normal">
      <style:paragraph-properties fo:text-align="center" style:justify-single-word="false" fo:hyphenation-ladder-count="no-limit" style:vertical-align="middle"/>
      <style:text-properties fo:hyphenate="false" loext:hyphenation-no-caps="false" loext:hyphenation-no-last-word="false" loext:hyphenation-word-char-count="no-limit" loext:hyphenation-zone="no-limit"/>
    </style:style>
    <style:style style:name="document_5f_PICTPic_5f_field" style:display-name="document_PICTPic_field" style:family="paragraph" style:parent-style-name="Normal">
      <style:paragraph-properties fo:text-align="center" style:justify-single-word="false" fo:hyphenation-ladder-count="no-limit" style:vertical-align="middle"/>
      <style:text-properties fo:hyphenate="false" loext:hyphenation-no-caps="false" loext:hyphenation-no-last-word="false" loext:hyphenation-word-char-count="no-limit" loext:hyphenation-zone="no-limit"/>
    </style:style>
    <style:style style:name="document_5f_left-box_20_Paragraph" style:display-name="document_left-box 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right-box_20__3e__20_section_5f_nth-child_28_1_29_" style:display-name="document_right-box &gt; section_nth-child(1)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name" style:display-name="document_name" style:family="paragraph" style:parent-style-name="Normal">
      <style:paragraph-properties style:line-height-at-least="0.528in" fo:hyphenation-ladder-count="no-limit" fo:padding-left="0in" fo:padding-right="0in" fo:padding-top="0.0972in" fo:padding-bottom="0.139in" fo:border="none" style:shadow="none"/>
      <style:text-properties fo:text-transform="uppercase" fo:color="#34393e" loext:opacity="100%" fo:font-size="26pt" fo:font-weight="bold" style:font-size-asian="26pt" style:font-weight-asian="bold" style:font-size-complex="26pt" style:font-weight-complex="bold" fo:hyphenate="false" loext:hyphenation-no-caps="false" loext:hyphenation-no-last-word="false" loext:hyphenation-word-char-count="no-limit" loext:hyphenation-zone="no-limit"/>
    </style:style>
    <style:style style:name="div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iconInnerTable_20_Paragraph" style:display-name="document_iconInnerTable 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parentContainer_5f_section" style:display-name="document_parentContainer_sectio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sectiontitle" style:display-name="document_sectiontitle" style:family="paragraph" style:parent-style-name="Normal">
      <style:paragraph-properties style:line-height-at-least="0.139in" fo:hyphenation-ladder-count="no-limit"/>
      <style:text-properties fo:text-transform="uppercase" fo:color="#000000" loext:opacity="100%"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arentContainer_5f_sectiontable_5f_heading_20_Paragraph" style:display-name="parentContainer_sectiontable_heading Paragraph" style:family="paragraph" style:parent-style-name="Normal">
      <style:paragraph-properties fo:hyphenation-ladder-count="no-limit" style:vertical-align="top"/>
      <style:text-properties fo:hyphenate="false" loext:hyphenation-no-caps="false" loext:hyphenation-no-last-word="false" loext:hyphenation-word-char-count="no-limit" loext:hyphenation-zone="no-limit"/>
    </style:style>
    <style:style style:name="document_5f_singlecolumn" style:display-name="document_singlecolum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iltParaWrapper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ul_5f_li" style:display-name="document_ul_li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document_5f_skill_5f_paddedline1_20_Paragraph" style:display-name="document_skill_paddedline1 Paragraph" style:family="paragraph" style:parent-style-name="Normal">
      <style:paragraph-properties fo:hyphenation-ladder-count="no-limit" fo:padding-left="0in" fo:padding-right="0in" fo:padding-top="0.0555in" fo:padding-bottom="0in" fo:border="none" style:shadow="none" style:vertical-align="top"/>
      <style:text-properties fo:hyphenate="false" loext:hyphenation-no-caps="false" loext:hyphenation-no-last-word="false" loext:hyphenation-word-char-count="no-limit" loext:hyphenation-zone="no-limit"/>
    </style:style>
    <style:style style:name="div_5f_document_5f_firstparagraph_5f_div_5f_lc_5f_dotted_5f_full" style:display-name="div_document_firstparagraph_div_lc_dotted_full" style:family="paragraph" style:parent-style-name="Normal">
      <style:paragraph-properties fo:hyphenation-ladder-count="no-limit"/>
      <style:text-properties text:display="none" fo:hyphenate="false" loext:hyphenation-no-caps="false" loext:hyphenation-no-last-word="false" loext:hyphenation-word-char-count="no-limit" loext:hyphenation-zone="no-limit"/>
    </style:style>
    <style:style style:name="document_5f_dispBlock" style:display-name="document_dispBlock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paragraph" style:display-name="document_paragraph" style:family="paragraph" style:parent-style-name="Normal">
      <style:paragraph-properties fo:hyphenation-ladder-count="no-limit" fo:padding-left="0in" fo:padding-right="0in" fo:padding-top="0.278in" fo:padding-bottom="0in" fo:border="none" style:shadow="none"/>
      <style:text-properties fo:hyphenate="false" loext:hyphenation-no-caps="false" loext:hyphenation-no-last-word="false" loext:hyphenation-word-char-count="no-limit" loext:hyphenation-zone="no-limit"/>
    </style:style>
    <style:style style:name="document_5f_parentContainer_5f_paragraph_5f_not_28_.firstparagraph_29__5f_singlecolumn" style:display-name="document_parentContainer_paragraph_not(.firstparagraph)_singlecolumn" style:family="paragraph" style:parent-style-name="Normal">
      <style:paragraph-properties fo:hyphenation-ladder-count="no-limit" fo:padding-left="0in" fo:padding-right="0in" fo:padding-top="0.0417in" fo:padding-bottom="0in" fo:border="none" style:shadow="none"/>
      <style:text-properties fo:hyphenate="false" loext:hyphenation-no-caps="false" loext:hyphenation-no-last-word="false" loext:hyphenation-word-char-count="no-limit" loext:hyphenation-zone="no-limit"/>
    </style:style>
    <style:style style:name="document_5f_education_5f_paragraphspacing" style:display-name="document_education_paragraphspacing" style:family="paragraph" style:parent-style-name="Normal">
      <style:paragraph-properties style:line-height-at-least="0.278in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document_5f_txtItl" style:display-name="document_txtItl" style:family="paragraph" style:parent-style-name="Normal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ocument_5f_education_5f_paragraph" style:display-name="document_education_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parentContainer_5f_langSec_5f_paragraph_5f_not_28_.firstparagraph_29__5f_singlecolumn" style:display-name="document_parentContainer_langSec_paragraph_not(.firstparagraph)_singlecolum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ratingBar" style:display-name="document_ratingBar" style:family="paragraph" style:parent-style-name="Normal">
      <style:paragraph-properties style:line-height-at-least="0.111in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an_20_Paragraph" style:display-name="span 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Times New Roman1" fo:font-family="'Times New Roman'" style:font-family-generic="roman" style:font-pitch="variable" fo:font-size="16pt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Times New Roman1" fo:font-family="'Times New Roman'" style:font-family-generic="roman" style:font-pitch="variable" fo:font-size="13pt" style:font-name-asian="Times New Roman1" style:font-family-asian="'Times New Roman'" style:font-family-generic-asian="roman" style:font-pitch-asian="variable" style:font-size-asian="13pt" style:font-name-complex="Times New Roman1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Times New Roman1" fo:font-family="'Times New Roman'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document_5f_left-box" style:display-name="document_left-box" style:family="text" style:parent-style-name="Default_20_Paragraph_20_Font"/>
    <style:style style:name="document_5f_right-box" style:display-name="document_right-box" style:family="text" style:parent-style-name="Default_20_Paragraph_20_Font">
      <style:text-properties fo:letter-spacing="0.0028in"/>
    </style:style>
    <style:style style:name="span" style:family="text" style:parent-style-name="Default_20_Paragraph_20_Font">
      <style:text-properties style:text-position="0% 100%"/>
    </style:style>
    <style:style style:name="document_5f_addressLeft" style:display-name="document_addressLeft" style:family="text" style:parent-style-name="Default_20_Paragraph_20_Font"/>
    <style:style style:name="document_5f_iconRow_5f_iconSvg" style:display-name="document_iconRow_iconSvg" style:family="text" style:parent-style-name="Default_20_Paragraph_20_Font"/>
    <style:style style:name="document_5f_iconRow_5f_icoTxt" style:display-name="document_iconRow_icoTxt" style:family="text" style:parent-style-name="Default_20_Paragraph_20_Font"/>
    <style:style style:name="document_5f_addressPadding" style:display-name="document_addressPadding" style:family="text" style:parent-style-name="Default_20_Paragraph_20_Font"/>
    <style:style style:name="document_5f_addressRight" style:display-name="document_addressRight" style:family="text" style:parent-style-name="Default_20_Paragraph_20_Font"/>
    <style:style style:name="parentContainer_5f_sectiontable_5f_heading" style:display-name="parentContainer_sectiontable_heading" style:family="text" style:parent-style-name="Default_20_Paragraph_20_Font"/>
    <style:style style:name="parentContainer_5f_sectiontable_5f_sectionbody" style:display-name="parentContainer_sectiontable_sectionbody" style:family="text" style:parent-style-name="Default_20_Paragraph_20_Font"/>
    <style:style style:name="document_5f_skill_5f_paddedline1" style:display-name="document_skill_paddedline1" style:family="text" style:parent-style-name="Default_20_Paragraph_20_Font"/>
    <style:style style:name="document_5f_txtBold" style:display-name="document_txtBold" style:family="text" style:parent-style-name="Default_20_Paragraph_20_Font">
      <style:text-properties fo:font-weight="bold" style:font-weight-asian="bold" style:font-weight-complex="bold"/>
    </style:style>
    <style:style style:name="document_5f_totl-expr" style:display-name="document_totl-expr" style:family="text" style:parent-style-name="Default_20_Paragraph_20_Font">
      <style:text-properties fo:color="#ffffff" loext:opacity="100%" fo:font-size="8pt" fo:font-weight="bold" fo:background-color="#34393e" style:font-size-asian="8pt" style:font-weight-asian="bold" style:font-size-complex="8pt" style:font-weight-complex="bold"/>
    </style:style>
    <style:style style:name="div_20_Character" style:display-name="div Character" style:family="text" style:parent-style-name="Default_20_Paragraph_20_Font">
      <style:text-properties style:text-position="0% 100%"/>
    </style:style>
    <style:style style:name="document_5f_education_5f_paragraphspacing_20_Character" style:display-name="document_education_paragraphspacing Character" style:family="text" style:parent-style-name="Default_20_Paragraph_20_Font">
      <style:text-properties fo:font-size="10pt" style:font-size-asian="10pt" style:font-size-complex="10pt"/>
    </style:style>
    <style:style style:name="document_5f_beforecolonspace" style:display-name="document_beforecolonspace" style:family="text" style:parent-style-name="Default_20_Paragraph_20_Font">
      <style:text-properties text:display="none"/>
    </style:style>
    <style:style style:name="document_5f_langSec_5f_paragraph" style:display-name="document_langSec_paragraph" style:family="text" style:parent-style-name="Default_20_Paragraph_20_Font"/>
    <style:style style:name="document_5f_langSec_5f_paragraph_5f_nativeLangPara_5f_field" style:display-name="document_langSec_paragraph_nativeLangPara_field" style:family="text" style:parent-style-name="Default_20_Paragraph_20_Font"/>
    <style:style style:name="document_5f_langSec_5f_infobarsec_5f_field_5f_nth-child_28_1_29__20__3e__20_span_5f_nth-child_28_1_29_" style:display-name="document_langSec_infobarsec_field_nth-child(1) &gt; span_nth-child(1)" style:family="text" style:parent-style-name="Default_20_Paragraph_20_Font">
      <style:text-properties fo:font-weight="bold" style:font-weight-asian="bold" style:font-weight-complex="bold"/>
    </style:style>
    <style:style style:name="document_5f_langSec_5f_infobarsec_5f_field_5f_nth-child_28_1_29__5f_colon" style:display-name="document_langSec_infobarsec_field_nth-child(1)_colon" style:family="text" style:parent-style-name="Default_20_Paragraph_20_Font">
      <style:text-properties fo:font-weight="bold" style:font-weight-asian="bold" style:font-weight-complex="bold"/>
    </style:style>
    <style:style style:name="document_5f_langSec_5f_infobarsec_5f_colon" style:display-name="document_langSec_infobarsec_colon" style:family="text" style:parent-style-name="Default_20_Paragraph_20_Font">
      <style:text-properties text:display="none"/>
    </style:style>
    <style:style style:name="document_5f_ratingBar_20_Character" style:display-name="document_ratingBar Character" style:family="text" style:parent-style-name="Default_20_Paragraph_20_Font"/>
    <style:style style:name="WW_5f_CharLFO1LVL1" style:display-name="WW_CharLFO1LVL1" style:family="text">
      <style:text-properties style:text-position="13% 100%" style:font-name="Symbol" fo:font-family="Symbol" style:font-family-generic="roman" style:font-pitch="variable" style:font-charset="x-symbol" fo:font-size="8pt" style:font-size-asian="8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text-position="13% 100%" style:font-name="Symbol" fo:font-family="Symbol" style:font-family-generic="roman" style:font-pitch="variable" style:font-charset="x-symbol" fo:font-size="8pt" style:font-size-asian="8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13% 100%" style:font-name="Symbol" fo:font-family="Symbol" style:font-family-generic="roman" style:font-pitch="variable" style:font-charset="x-symbol" fo:font-size="8pt" style:font-size-asian="8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text-position="13% 100%" style:font-name="Symbol" fo:font-family="Symbol" style:font-family-generic="roman" style:font-pitch="variable" style:font-charset="x-symbol" fo:font-size="8pt" style:font-size-asian="8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position="13% 100%" style:font-name="Symbol" fo:font-family="Symbol" style:font-family-generic="roman" style:font-pitch="variable" style:font-charset="x-symbol" fo:font-size="8pt" style:font-size-asian="8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text-position="13% 100%" style:font-name="Symbol" fo:font-family="Symbol" style:font-family-generic="roman" style:font-pitch="variable" style:font-charset="x-symbol" fo:font-size="8pt" style:font-size-asian="8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8in" fo:margin-bottom="0.4165in" fo:margin-left="0.4165in" fo:margin-right="0.41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Paschal Joseph</dc:title>
    <meta:initial-creator>Paschal Joseph</meta:initial-creator>
    <meta:creation-date>2026-03-17T07:52:00Z</meta:creation-date>
    <dc:date>2026-04-18T16:03:55.127848825</dc:date>
    <meta:print-date>2025-10-05T18:23:00Z</meta:print-date>
    <meta:editing-cycles>14</meta:editing-cycles>
    <meta:editing-duration>PT1H3M50S</meta:editing-duration>
    <meta:document-statistic meta:table-count="13" meta:image-count="9" meta:object-count="0" meta:page-count="4" meta:paragraph-count="106" meta:word-count="575" meta:character-count="4394" meta:non-whitespace-character-count="3932"/>
    <meta:user-defined meta:name="HRJ_IDENTIFIER">786c7fd4-e568-4da6-85f0-505565951c25</meta:user-defined>
    <meta:user-defined meta:name="x1ye=0">uFcAAB+LCAAAAAAABAAUmkWSgwAUBQ/EArclDsFddhDc3U4/meVkiiLw5XUTUAFHCBrFOAYTEAajUYrjRITCURQTEYQWVmjK1Yu2uU8yYmG34WVvMxBZoogD3IvpySL8qZCzg4cETlNCsSl9xB4Sc7WPo0yhZzvy5y0/zutlIDjXBVx4vVEFWcFp6/bhECHSdwkSR3zvRCeiH2dqrvzFk6Sogq1O4mB6PZgsgIQ2mxFYhEieMU7qFQ8HP+dBDL3</meta:user-defined>
    <meta:user-defined meta:name="x1ye=1">jdL1JucE+F6PzRS6XByO8xIMWgI0bb68v9jWQ3cGZJ7IFeQ6nkrE5Q+eAkyPnJ0VlPLFEbp+f4EC8DZOKytwlQIUaSkNvlJjHhLgZmZcQEauTALZTYdQHiv30D7ggwBOhSkvFqJd/STADqW1qRU4vjMQOjIWBZy3+jCdWIfdKpHhucJ6aIv2BtY9qbSCoq7fLxJ2FlC524skSccmHsUpWJnf9Y5Y5GoEPHFHRSZpICp4DBHuJS+BCGWoPVL48Do</meta:user-defined>
    <meta:user-defined meta:name="x1ye=10">d+F8wqVh+dx7LAsaWFz/0l0OWvknTfb73GXxO4S9yDTw8Ki2bEJ9CIxov+VgFg7oP1ET7baj7w5QAFhILI2gfoyisCSqcWoKPo7Eb5Kt6yMVKusRi9qVk286oAlitf/qhIsjTZSoFzHN2xJAxu3AIcxPpI1yX2Lay3OuBwB2o+6zkYR22Z7s3Mm4DM+qHX9Wj2e/v1j9kkGeABmhx3XGAy4L2MhB2QvuBQ4YoGuKKBrVFwwucQah7+i1mog0ezJ</meta:user-defined>
    <meta:user-defined meta:name="x1ye=11" meta:value-type="string">jvN4GAEqmkTW2d2jMdPm90FchuSOZqviUSorkv8agLwb8sZD5OLPPBFq5eTKvvLEPSIoRdp5LPQmX2qdiRirTjNvYvofumo3g2yBCC14V54Z9egGxv/XhvmVZSIP8un8u6gdiesLj819xR43FvVF4f607hKHOHix/kuTkpV4NUdx3fom0cOP1Ib8vWRYzXQZvpx0JVOudxRlanA0p9NzqyO2v0elPfiqtXGSLd4QkpSMThNx6B8rgfMKWO1sCnv</meta:user-defined>
    <meta:user-defined meta:name="x1ye=12" meta:value-type="string">66eO+NrXyF8jRoWWh2Eug4f0IZwlWABNSg19f5ChP+ltsKvEfnbLiJeCBtefljbFlYBrk39r79f/oAFMWvmcUEFb9o+a7QKsaR4zJ/VIVPUIv2u+a2qn9TwAcUf8zB+S3xiE8mD/Rv2YCkOPUxa/3cK+R8Wd+xBtK4VKvyeR9GvDFxcJ5QujcAKC3+8CfDKuye6cxuG8HX3oW7ZqOVcWuKhwR0XKy0HkOl3GRpdNNL6HqL6O7K9a5YvgwltqzZ9</meta:user-defined>
    <meta:user-defined meta:name="x1ye=13" meta:value-type="string">Vnw280aWcknGvgm5DHBWOM4S1cOeouTN6YZeVnS+MIrg5+0y3PKQvPNIpU8buhTLoi1BiRZlfXNLVyW7eSUDOBe4WjIMsa3oe7vIpS+vgD1OD8Tq3HYefR33i25wo0E4XKUQSlEV72UltYGsx9+CfHwOOtGQAJ//ztelroz4L6TpUh2BQMKgmXydcoFvHQeoTT8GfXpXqw0OXC7W+ybU1QfI6/OKRCr7OF8WB2lJfRfBjN0nCL18hXYymNW+qPk</meta:user-defined>
    <meta:user-defined meta:name="x1ye=14" meta:value-type="string">zeNAZfgJfyOeXJDnSyNQVueXp+u6FX5sy8mUY/WG314O0AcecCvGkp4L1Q0g8iwqzhXDYVf+g4pcavjpDKZBGvyHgFNC+8O/sKzFOiXEmR9mkKOTxRO4vew0/JKK4qFNrZjYpYXZPb7wWVIB5o++cOT2cUTid9Ky9nJ8Qar9bRZg0Q55IOoKxxwxr7ZI+BXmiLAGx+v4/p9r9P4HtFd76ELrb4zEk9vepgxnAfRUwxWz5cd9xKHlJtCqTUIQa9i</meta:user-defined>
    <meta:user-defined meta:name="x1ye=15" meta:value-type="string">kcCgEKher6abjar3Tk7AOIvwLvtnsVMWqokgs7Hz4T4N5hjNlDePhF4JWa+Pw7NIe3lUKDA2JXTGQK21F5ZcEGOm3cwjiuupCC1AZde4yB6H3XbmdMXCTv93NZI0z4YDFxb+rahIhQgAxjvpGCxR/hfjv7xoFb9Rj1n2bf6wmLm/uJD1CzW1e2UID7BFOxWBmcXr79rKdzU420ug5bK6iEjwCgxHdD8F4TS1+DDBwdjui4pHCnwx/U4EkaLRbcW</meta:user-defined>
    <meta:user-defined meta:name="x1ye=16" meta:value-type="string">T6crvKa7CiEmsMo5f3C0+jUotUSuavQJs2DhMxndTn2kfKer30aXCqbhsiZPIvD7gjCxwmid20E1speAm+kI1tdxDnk63Eh9gnUWfrOgDCPYms6zodOteqJwF1HYs4qKdq9KxhFHySjAroodSQq0eUsYWktcR5h8sA43IALfJRfyMBseRsyYFJISAOp43w/p7Y58psDXXdcFmjJhiFzxKzqAFkII93Bqp/zs/OHLyz+mDv3xIaZ9aBRcgqrLVjK</meta:user-defined>
    <meta:user-defined meta:name="x1ye=17" meta:value-type="string">Yc1IzDJAXFoRvmHyF/FzDF4NtILPRpmQ6NXKpDOJzXYMtxE6Yjzjcocih+iuiVUHwMgmC2oUtgQQDqz7i3dnP3IiNkINLzjVtoHVXQwXJTXjL3lf00u7ifdECNh8vM0Obe9gcFclNmaRtnioWqsYVXwulBlWyEApi98KilqP1izxmF3jgO6umMF/aE4fMBGzN3dPWzFec9Za7eiok5aC8G5oL54shL0oL4WX8mWNiDyfLRzcrhb4zirOB43AAsZ</meta:user-defined>
    <meta:user-defined meta:name="x1ye=18" meta:value-type="string">VQDsIjcyGsJdd2pXEAuhtqXFwdzv6OuL3zUclwkn3hyXf2eeipdNMH6Csp1Vpolh8W5raJquZJKXZxoiTEQMd61V95uH9JO6/qwWLJNCyF/5m7oHGlwYWSqvyBpGXPRXNwt2Vp/RvNz8Y7v0Xw++JKVEePVfKzE1ydiYJt6KsIUs+gP1bC7SJ+dmXqM5qcgOPSrX8Lwwgbcv/Y0Ur3bFJpZVjRAwXqEU1mi8wmFjqKS5WruWr+4DnKKutlNDXfS</meta:user-defined>
    <meta:user-defined meta:name="x1ye=19" meta:value-type="string">xWEH+9LPS9BG7SMHjq5c7rXzTGhrudzhqcYg6pEm9LP9D3K7kXiYxlsZAatZk2xM8RxOP8Sd2Ys9VjASlVIunEvWdMAzLI9L0gWjW1vgPniPy4pvE1WY+vEU2ajTrrs9Qs1BosHUFZZiV63uF4oOgKPWtsGLe5qoFhEEAdhxRWt4WmJ2Ep0TfLH1G72yH335G2pZLxkbY5CVJxg72ObAuA1WQN7vJDBLjmIfMBWDhsgLHuyZFF8GMGZkrrLzGDt</meta:user-defined>
    <meta:user-defined meta:name="x1ye=2" meta:value-type="string">aCjrPVdQejurNyB1mYWySlkKW1pLvtXZVJsxoAJTJlmPEzc2bwgeI1H20+uBmsvgFx/6XQR3JmswM/qayzuPxYVEI1vipMhpWXT8nJfBdZ5Cu6Ld4V4Li4QlHMajWPoVkoQIJXc7lFihLS/Ywygl8bKhN2axoEvDARTKgicvK78/RuVPKZ7LxgbCXIAfo4voq3tvL+Nb0L4FGyNnyS5RXbJmP9MNssf8o20AEwuI2PpGu//wlTSQPnNT+io3RQf</meta:user-defined>
    <meta:user-defined meta:name="x1ye=20" meta:value-type="string">FDfdh3B4Rs/GjAhrZS2mpsci5TtJddOiZUD6NU+DchCxHYt8Y9cBBeB9O5as7HN1JZe9i3wjS67D7OXUXKmff0VLB31/wc20v3VmSoMmzI4KstRDaN9RXsMJPcM7+RaBbnxhK1VkoHfuujgP1A1VkyhugblJZmTk1fk1h2d5eCmlII83evJRqi6Cel08G4SXm0ssgDB7pokNy/qOj9EH5h5vukFPcnIiQLyr54EzhWLrglD4HFmccs7a4IfwpMP</meta:user-defined>
    <meta:user-defined meta:name="x1ye=21" meta:value-type="string">B3nDNXePMePvXkdRM64UF/dVeVw8lpRj9XGpArcgPnY9pomZFDddUY28CA0pds35SemLwuscXU8Lz8zzduNF+6JFA94xFj6yq6Me8tl2UWsVSnjCZt9dQc4zDvUCLtqnt9KDaL4n5MJHMWOijOCkA+36oE5cgrN6b/RBoPQyHiH4KwBBC9bJQJBGHw8iMM4njsXuz5dRfQUrCdgG2QBpV5PzVMuEn6EPTKm6SAtXiI7wcfVQP30y2LAPwZhWvJw</meta:user-defined>
    <meta:user-defined meta:name="x1ye=22" meta:value-type="string">UHtA3vMmWaHG6db/5hD5VohWTiUeO2gjaPDgfylOo8Z27QULy/awU+d+WeWVEIkpMSSBIg3kSct7DMsmXwcSSabUTJ/J/QaWev8Xr/jMFyZ8YnxQZ0dFepqJcmXBsINJuOtUczBfzWo0hxd13lFrR16BSdGTXZDlh8TNpzKVDW5mnH5Ppj3G/oO5XF46SQvsBEu1HCfjlCNl48uUESwlcwj8SvyX9yeAip1OW9aJG/smyjQeYGOmd8DsmYYeA5N</meta:user-defined>
    <meta:user-defined meta:name="x1ye=23" meta:value-type="string">ST4maWjCfYXhFMegy2ToMSOcJR6fcdvDX1QBZo1FBa5gYHU3yodtJ/C2UPRXNY71YKiDo8mk6LyiUjmkJgl9t02HGcpV7RlNxJs9Y31oZlmCdtKJbKv9BXIuG9gWvsRPW6xcao2lwNeUt8+czjtnjaorUSMv8xtLZ/pFusY62TjM5TWjIrkhjmyoPjhEeeLUUvh6Nn1GGz/Uh7L+RZGssGD6xktTdPFXm4XIhgNvyEGSBw4i+GWbI2zqMHC0jVT</meta:user-defined>
    <meta:user-defined meta:name="x1ye=24" meta:value-type="string">uMSNnXBFjh8JFe5zFc4cf365y6LsGYvArhSj+tgkYNJ2zb1JcBtrmyEl8rWm5M26duf7CY3rVrs/pKzWe3MOIAABKlzUtFJ8ujkIbQCO8Vv+bS6dYVKmQhsR7HRYOl+PA83Mnwo7Ug2HmRCV4Sg2W0HvFhJ0q6iL0tnDVYI6/ln2REi2r1yshO4PpcPd06M/avR6ChT2YIUy+UdJGbTZpn1/zpX0UhgW+ha5JzCQtKsYHoRJMAcYnnkHVexrHaH</meta:user-defined>
    <meta:user-defined meta:name="x1ye=25" meta:value-type="string">jmrz9Ov3nwwOanyzsJ1rHObW1oPU7weuPzEtG1pRl+fm8p1KpeQNyoZ/2bxCZVH8RRo4w733d5E0CDHzk2Y5dOk05LRe84iBUUL7rDG5NmEfUfAqFYuNu3Gk7ce/AniszkeP9UC2XZ/S7ck8wLuXlpp4EE3bYRfC7TyrS4Fqgwh84HobM51AXyn1o+AxfPCEm0/7Z5ANc+eYnvQqQAtRclJSljr2ufIGpuvRfR6GJyY7wXtP9fibbkn28/ykOV1</meta:user-defined>
    <meta:user-defined meta:name="x1ye=26" meta:value-type="string">aj62PJuba6ULD6ajSWpXxbTkx8ayS5GS46xPvhepPa38pveNxAe7YftMUk+MYU0cfFq03RJ60icMfpW/zdq+FnegEhMbM0U4arVaNFDbS0Ih/4SbffwdEMeUUgKUoze+lcb44qK+dBKARJpQvZ/6SpgniteGNQZ9JUOSQf7Z0YchQbImL4AreyESh03OkoNBPg/S0HdLH2T/XQMGtwaKVqelJSFYbIwfwp+mxxzu+nB0uRYrr8l1AX146UrGeiU</meta:user-defined>
    <meta:user-defined meta:name="x1ye=27" meta:value-type="string">QrGtKXjcX8UJ+LLE6s/cOHbVBnyRdFLP7SnShL+3umzHFp2lx3GFwJWpnzZJN9SKfXu8yVgvbFNDN56xQALJebNbcQEruGV/FMVqN8WzuHF9TB1PpzL/Xf0XbDXRmvF5qt6mQdjxen1ZrKhK4t0ETsL+zaXhf0Jf0hzHEDhX+RUt963pui8tO3cVO/EocEGwsgbeqwb8lbdxcWoyjSsXrvDVB9fsT9wfUbzPuswhoVVS2svHxH0clp9HrGpYCy/</meta:user-defined>
    <meta:user-defined meta:name="x1ye=28" meta:value-type="string">ds6BEAPhMYLywYkYvgHD/aZNY/iRWBSIGUSisaRC1l1pO/d01vz52B9GR+hkCC9UczSke1JWVT0s4q2oKV5NiZnMp3FQEhu7wvXD8KOElUwHkbMsESrw45sktNYWA8QArWd6zZIJhteGB8XXQHDh10JN38mYw/spXJ1nwfDwsrdqjGA+n/vmnEGyUxT+mmEr9fsa3sBRqucY+mvG2Xhu3jh0X8m0YzeI7RYvdTE57ZX9tsEsH/lJgIKQ0+kwOnK</meta:user-defined>
    <meta:user-defined meta:name="x1ye=29" meta:value-type="string">fqHJ8bF/CC/DwJDrEtb+zcGpsbebn0fiYj1tww1r6qVfwIAtXTp4WtVdZKTYi7o/1hjcU0Wa6zVYVbmLHrCc/EnS/8RsKr255eQJryYfY6pOMmnGyRbqPKi4Yq3zhTyEV4LHy+b0+ltV4R65nT/QNPz9I9vYzJoMAI4n7KtifbhwtGTMFrk6GldYMQWli+uMTH4t5Wk/DJl+WrkFDcSm2zdomDS19Vo/KjjAPv+blmNXmZ6nsZiJ9qEWgKR8NIu</meta:user-defined>
    <meta:user-defined meta:name="x1ye=3" meta:value-type="string">VkBRBjDjBETFfJgOrobJU6hX2AOArpwQhdLLHIOYSxl1VvKZR6xedYLI8eE5kSdm/VDgsHiN0goKNjwuP7YmGmiczs6dQA3++VkadUxYMmiOt0pHtAi1vmtsgDdR+bLsagl0jTnITU33rVL7atmDw/crmhXDuyszIWc1I/NL5w6R8HD4O5Ev83XsMPWqpRAL/0YOzlVlL4VxDg3B3JSrow4dOTKlt2PDIq6Ng/m/nncFH0D11KOlDo8K6Rf1y/q</meta:user-defined>
    <meta:user-defined meta:name="x1ye=30" meta:value-type="string">XIjQrARrQdTZsUrpHYUvjNBo8kseEM1aWnjSgoiL2XP+I/Iy1qQPhkIqP8wtMTxzctfJimhubxM+rTrPBRROiI0ExPTfALI3CfmnNLAeriOGvfCXWA98BABQsA6hHOWtGQ12JPGTjZvqMWWff9E6b8Ws/UpXQSvg+7Mlao7BSn6IRSpGZZiLniTUs8hlRczn3YRXThnOXBBs2NaPEwHkW0sKGzO0XvGUZvQ26br1Zv1y206Ed+EVjJNoN+HKJQt</meta:user-defined>
    <meta:user-defined meta:name="x1ye=31" meta:value-type="string">jxvZipvuGgavzoPFvzp6F6prVdCrs+98QTk2eFXnj5H1ULOA7qTldhukD9EsjdrAX9DJI0BouPoZwtmZxG4OGKAXo2uXoNwJ3c/slOALdpm3sJUUfR0P7BQnYH1bnKfcB91nl2z9HdaLYDgy9Bz1Y0aClRusT7MAY903odEeYKydaT/xhT3uYRZH9t1dx47rXfSN8qSlDqhKaOXE7WqMLlf/iQ9LmDxToENcrqkhGRb6MZ6USVZwclbvS7fqb4L</meta:user-defined>
    <meta:user-defined meta:name="x1ye=32" meta:value-type="string">SJDwiQTTJGJ+BP9OZskgR6a3zBB/lhVv6bUsRWyLcayVDc5v44+uexqxiEQNM8wzHF/PKU5ssNeZkF71W1GiM9MydrKOLTOTbCfqnFUAF9u4LoCvvv70rTW2QkJ+g0u2vC7s6B27nyhaJioeQ7URcoikneOlHYYXRJDaGxwe++SX7SO558G+Hlx6FobsA7wcoW6fisB47/EVHAT7PTMUFyoCEeH9By1705/KAFkBaf+6oeOZTxl3817O89wIJ+Z</meta:user-defined>
    <meta:user-defined meta:name="x1ye=33" meta:value-type="string">5lbLmtBTzPK3uNx821irYm7+E3txGlIJvKrIQpJWs2JELnlyIHRenC2evkc+u3g86DyGGx3PEkkeDJTqnTCNFpR/SKJ0ivoOcRPWsOByPK5aOz3QOhgZ8+EDptwZ0SoXbnIIeBSuO3+nouegUKKnefnn2i1vHpPeYa7YacZ/hth/IyElfy4BzfX+HAQFhzVr4EI0bOlefe/g5gsJ4nwp7sndwVu85F2ZnCgzp1YTpfirpPNWnaqUdZvcT4PA7bK</meta:user-defined>
    <meta:user-defined meta:name="x1ye=34" meta:value-type="string">dHU5eXzmgY3wYByANHNsZff2QmdXnbU3gznF9mjKJoKJSJf2cN8EGcBFZF9YsXBJKtQlK7DUXldwT/NuaVl3vIOln9u9XfYCs2iK9h0mCavWKMOXk8l1jzhpoIDGf2xyzn/bBWF9L7HQud7930W4pxCf99l2ASMXVaqPvHWlRPwZ/FFuIjODJ8N54xm5t3KSjr5RyLKdb47UGezb/QPamfff/dsA/r+ttuDGOmePwloFj4GKeU1u4XsA020yJMs</meta:user-defined>
    <meta:user-defined meta:name="x1ye=35" meta:value-type="string">u8wQeCkWer8x6SYNH/JN9iS89u2B/1D3Qq81xFd4CgvtS5yNJPoxMutrDb3MyW00ojUKYrGUXDUfQloiIANzpGzjbdDU3wZj9kFU6uG1O/uD1zSN2AscFW02p+rMaztez7x+WrxaMzyoGXhfg5bPmQEYuNlW15tuQL68gL43gJI6PmZ33Rp1PmQ7CwglDW4L+qwvHouVnx6ADCJL3xg6tkc4LFH4sYUddLP2C4JZdsmp0f0T4QvzJwlSPEJhHTt</meta:user-defined>
    <meta:user-defined meta:name="x1ye=36" meta:value-type="string">+5U/xZSHtyMutDdlTcDzwAUGhmAja0yZQVRslNxPRb3haHUZbIL6eKVvuAFMY1JgZ3JwW8nBadELPyQZcZb0hSoY5lLqu/czVNTnXTaPsLjLWlaIDbZFyJhi/eKuvFCY/dJ6VX5Nj3AeFLHUcL2VgSVHj1njS2aoQgY2Ytm+dOE9E6mMnXuWUewo07bcxHJ/JpNpSLy64nB/ao4g9SmNG0nDsvbompy8jjSmTZgHKL3Ow+C3TH5aeU7I3qEs3vm</meta:user-defined>
    <meta:user-defined meta:name="x1ye=37" meta:value-type="string">oD8gEC1Pp+9Uly1DXHClFumC8yxc+P9uqlZ74mXBkLfBWF9CiVnMkj3rocCoQMCC1/VYxlH6XJNWhm9Nn8E4bBv1FtZkmWEuuR8uMgW6s+SMoTQp0P2JW6lFkkX6G+bPc5QKYpE1BAHk7mcU9rPJ4gO84sIBR6o9KRmMsPoA4+IyZeNKoRcKBEEaofeHPhia12Q0wFEXaihM+1/7YPeoWo3BKMcBHL0NSdzqnC86XszbX1bz1nnWjX1AtonY5k5</meta:user-defined>
    <meta:user-defined meta:name="x1ye=38" meta:value-type="string">F28zsjQ9wLP5TMnihOlJGD54KDfIXIIUipvNRyny/AySAeH1HdNrr6048AbeJop3+h0tlubby4egazGKm7UZt03Dn+Nk4ehIcIzyutjVwHciz5zWxJGQ5awH4RVF75Rsc1JM3U7oabp146bvyq0E+8m6lTnfzDwyGWuxD6/6iGKs3bByoaGwlJ9DSyZUvWDXA5ttQhbD3iAE46gTtxY1eK/lYGZ+KZKZg/Nsu5c+82h0Be6dH1klJJLUjCuDaf7</meta:user-defined>
    <meta:user-defined meta:name="x1ye=39" meta:value-type="string">qkITneKnyjuoNs5eFP3hHnlCu9GsWDoAZDE9PZ8KkSxK7gtNUDfTm076WPmmoaUFmMoXSn0Fq3q0Njs1uCgZnVfVZCgsdoEeJCMoW3ZCwb3WJgsrqfhm/GTfFzlc/0Cv7F3NGWjT3KrfU9m8UupthZnIt5Pk+oP8v2B6khchOvT4itqygroVMzkCOpplsNWN1TTp9DsFJfTu1yrkz8pgpID+rzoTVuDwa99B+I/gRu8kqvYzC7SdOJZ8bu4LgNH</meta:user-defined>
    <meta:user-defined meta:name="x1ye=4" meta:value-type="string">sptR+64Co8FCATXvrXH7LiDWDWuuk/ATcEPZJm2bRTmfjxL5l4KzWAScKjouQJdXAIJA6zGSNqpPl0NXHUfG5D1bo8J7I6WoE22rVIPD7a4ktaZCxVFzlCS12BuiCplUnWG2BJwlz8EhRWjFkgERx2aob3YTDFvzRDyj7kjwB3nToNnoHPMbRPi+0DC8X4RHHdLieEqTwt7nNFD5GKi6E/LN6ZRyLMTDEA1HmcE7vY+QyoP2IOPdehTwIW9FXiY</meta:user-defined>
    <meta:user-defined meta:name="x1ye=40" meta:value-type="string">bswrxkewy2fhzaRFDhK0VeU5jIYLHUD2mlsSoFHRXaUQX4rEtisJzVq8egG/VzXvHJ42KjS/Ts5qKOxrmLqM6lDwXUEtPlVcDcTKTevcPY4REWasmS5XR7E+bbWa8j2a4VElAT8dsXja+dlrDD8vGkhCXYOm5Gesz2IoFEcqDsBG1UEDvgWWx6qBJmRzA1qRDYP5plX+7svM6Oi0wwNWvLQLE+d2UZtG3TNkHKb/A456rOHd+p3PY+LnYQUBgdU</meta:user-defined>
    <meta:user-defined meta:name="x1ye=41" meta:value-type="string">ns+VTKO0azfpW6eaIRKQldvkXlUw1BhN68xl+NdDbpr4fRuGh3OiX30UUcqySh2mi2/jRv+hDmezUzhsDLS2Z09Tbt1w2aB/LxSpGU2y8zXLWDCNdKn2QAcQv3ztBR2rUFxHcJJp//XYyZQIjeE/OdBc+nMLWSsAgEDct+wv70Vto3fVFVXmriFOD3QP94T8j7pwgKzCQSS+coCU5lHFf4lXWqZ6DE9QY1ekbhDj0G6XXA1wvz3k55TiNSHMkjv</meta:user-defined>
    <meta:user-defined meta:name="x1ye=42" meta:value-type="string">qqKNeTFLfKMaG8FQ2utyNxFj6XHPteEByRSYs33J+PmNrK9xap/EilmCGTWdGUH2PxMLiWM+jhMkZUKiFz0AicA9JqOvTOoZpeZKa10AZimV+NVKuqQgtd7u4K8hNChGJr7acb0l6/MhiBJE1s8LdjigZPHszyR6FpbZfAfEcONBqOD4B/1f3nAoRYfc0GNOtI2Mf+oyNjo5rLuplkrEn7q6Q/lpDOmKPoLE7JL64n21P9TGrZ3Kk3Ft+UkXEyP</meta:user-defined>
    <meta:user-defined meta:name="x1ye=43" meta:value-type="string">JDek8MDsiv6juHEBFJRE8r3cOSfOTXa8qDLrXVIiqvXjxZqn8J2XxDDTQ+OhI0wqzeByzxownHpZrDbtx613XthB88LJ/v0efdWjI8I0qpPwbJ/FB9+whlUEdLGkYyvtV3NSKWpYXxNYoZNDH7Kn4wmXDTCuI8UaCr0oXAeEC2Gky1tPm2N+0A97uWjPH7bwtwyhqG/A7WsPdLWLq8WcS7NSnvPWZ6cj2OVE9AOKJVvnH36Ke8yuADMth57acci</meta:user-defined>
    <meta:user-defined meta:name="x1ye=44" meta:value-type="string">5Yo3Elk/FFMQ971oXqAz8XGbjURT5hZckalD4/fGDOhCQiIduKzGG052ysDdax/2MRJO7QZvlInba0ikLJhjW1kVsnxdD/cdWXk9VqBcp2i8Q99RsYG3jG02Wic0ckswPJqkmLxvEAwBTvOI0cH2OWeTHR3cgJhvyqCMA9nTIPmwKeq6hJ+9oMmajgF0+dCVN0ocnegwK/EHh2pY8jndE4pImiUTTkp7wQfEl6kZcb/N77bta7ViOY7ZQAAFHjH</meta:user-defined>
    <meta:user-defined meta:name="x1ye=45" meta:value-type="string">YaSWU0tNT8WYjT/T9vLbOk0w+gSsXtuHZhfJJ2cPuMOV7lK0ceagJaAghGjM1lu9zSPxv+SleKQgeOTGf5LFc9ysqBmn2esbn2PDbNTc+pExAnKp9g8+tT5Ol6TlXTBMX3Nc6Y/T6E95fantl//x4Mz1VX2kAU8CyKmbVdkSp91cVh2cfag7li3bB/ycSZ6GBSfU6G1W5nGAO86+knKzPnGF7qcEIopqKL10HvNE+xVvo9WXhEUzJkk99f9NLOZ</meta:user-defined>
    <meta:user-defined meta:name="x1ye=46" meta:value-type="string">cZlbIFeSMbxBm2wMZqhdrBwxJwlEkGF97JvIxWO+u7oVibOiEwiulp1cOn9uahxO6vWMclsF5IlQ9IIOskKu1WZFY1Uiy/8F0taHzcRBfVXyf6SRWXlbTroOurF82ZRDTjMOKOpN+knV9P+ZnPHssfVs3Whr1FuGQgFtKk6x1NfsnbmhZiwYGYTi+WU0RIheWJAaNioZA48jvENSvmRa95zMFgnDyWVQNjj9F9ER3KEK+YO0JHdyaJOXo1QG3Pj</meta:user-defined>
    <meta:user-defined meta:name="x1ye=47" meta:value-type="string">frzoDWRhals4z4ngcKHBsXeU51d363VUSVp064y+10D5da4xX34oiQjSoyumUS/8nMmZukfQi6pQbWRLkePdDKok+YAUxN+NrttYe+uRq1Nx2P4GImlz+aHYIFn2xOwdbhHuzq20pyNHnjuh5NUox9kAVTTOTwqiOevB4axsSJYpA41Ywg45zrVgrI64tq3yqDQVecmeZorMKnew2ruNXhyxh3bYT6lHPmywooy32rqLxIDkkWJNVVbCvxmyIpu</meta:user-defined>
    <meta:user-defined meta:name="x1ye=48" meta:value-type="string">jHpa9mwDzc8y56aszwgHJP6o5S9LnHduvbUcXXhLzq6Hg1+18/3N1UnItWf6YM3uq9qqYHazwU4BXwZra17YwFqmAYIPivkfEwx1jG5ct94DCBiQ9QJGpGgM4+n46eR1Lqe45dfcMx6KvXEUUJKMQvZqrqpC5Llv1Lcapu9JdsLXilX9grBPZN1VbBK7gbh1Mg2Kdx/fbol2fuR7c1fUb+RK/SLQg8IcfdYWpyRRjbNswf5hmzbXrgRN/OHwR8B</meta:user-defined>
    <meta:user-defined meta:name="x1ye=49" meta:value-type="string">cOd9aVzvNrqGlwrErf3929djzpJpEP5KBPLNV7fyZpS9ejhcKd5iBA4fPYx6GWCwl4K114ej8SXoC9yH++WUkjUGfhW7XjZ7RjkENSTIceozZ/U5zM+y5vqkKHw3CXoQu6tme73JHMpsQNoTdjoCVCZF5bssodBKihkWz53P7iv9zztMCg0AeBeL6fi0+35jwVfsExRLmLYA8esYjsQnFctLacQidXxEj2lSR1H7h2EvL3dzGhbyuDd/GJps+Jv</meta:user-defined>
    <meta:user-defined meta:name="x1ye=5" meta:value-type="string">CwJ0nzhPfL5I5eC6337Dq/ezW5+rDJT8I2uZtbHWTaHrXgCK4dsUKtj/FLwc+nfv1MkA9qfmb20eo6SqBhwcRB9pNV78N46XnTZkKHQvmPQO7S6zeSi+W7WeZ51RrLZe0qtJnanZ8SfMgC8Q2kS+/JvBFlwsgsRsyAA0oAL4Ce1ozVRYByhl3k/PJeNjD2MMjorfqAbiHhZhpBOXMznknmQu1qMwZN6hfm6+WfcC8u1ysu1Hk8MqFr1J7hExv8m</meta:user-defined>
    <meta:user-defined meta:name="x1ye=50" meta:value-type="string">oHr/2Cd22neAST8UxuQEQ6imdkxB5skfPMdSHSdRcLB2KlOQ9f4j5r2z3jBBATiJbYWgYPGV21fHhXb7bitv0AmBOQ4crZxRdmgUYPxyv9f1Sej7FuBV+ixbz3ECorGZPaxRCO4FdHy/Vwgzj0F1R1RJaBIsal+CusrkW+dLfLvUGFhBD418ecCLnhlmuRtFnDIXrN6auZqQzwJQsh/vuDToEEV+UrD1fU8ADHqQmtxlRnWV8WFxlnIEaO/Xh8r</meta:user-defined>
    <meta:user-defined meta:name="x1ye=51" meta:value-type="string">8+94mRlVfYDwKbexTkejahhFqxsi3oGVsojcxemD5yeUZUtDAc/rsszECdgiMZdUWCEGJZ9MEIv5IdtToLHWf/dhWysNa3QKJi7lC/7pUfvJdOvj1RTtDTj3pyM75ZlluUKcRLMZJ7WyvdPK9206obNqRYoL0PDD5EbrNqS/Jx/Gl1I6YR6kfZT6m1T/YLK4abm0dpapSlrLEnNNWrJqgXY3AYMX5fSAmRauMIjFB1+UilqWPVtwHSONeS7uYi5</meta:user-defined>
    <meta:user-defined meta:name="x1ye=52" meta:value-type="string">6fyuCx1LEbTg4a3mf26fBJwK0IT1FW8M517CEkvF1A42ISlosOUU+2nI82GNXMFtS8r+34BBKchjHLB8Lqb8vl0APNBk1P1OlPftpbMPCpY3WrlRsE7xDPoby0lxFT+geMrp15u0TKjrw2ZAI6nMOtuW0WwJmJkpbb+y5YeGDQ8z62CPVr43082Yb2+oOOl+X0V6rPfERrWdANmKQPbShX0a0Oq3VkFzR/oxKJ5OH+tq6UnFh7U+3B+BuDddzhY</meta:user-defined>
    <meta:user-defined meta:name="x1ye=53" meta:value-type="string">fXd5Had6Y/2xC4HByaXyLqx5/6paMekuNPfrOrXQSv0Imo1W3y5ni5s8ehc01sPk4UVYL9r5m7VSaZZTUrTJ5KWQbxEfdtlZoZXmZIOpnnoJHiJr3YSIY8l4u8+ab9y1hu+yfhceRzg4Axq4EniXGp0r6SsrWAyZV2eARTZlfCxutsMBQ13MUuyQR4yNLynwFGYdtkYdR78x1KsYAcIFDjnCqO3FNt2wzl1MkdOvid0VI/YMlvYa1c9qS+NtI97</meta:user-defined>
    <meta:user-defined meta:name="x1ye=54" meta:value-type="string">L4Y77qd3KAfY89uvLzyz3lngg2/CpnCUqanjPr2i4suwHQGl8kA4r2y8nlwiXA61+AUxbLUP388cQTnKX4nvPPI1Q/qaDceJAq7qPeLFk1CoXEjINuA0/3vW0znAkKfcHYdf7ttEumM4vgNktjrgqUzu1ZT/4S2CvkI+pH9XksMP5USSy1uOdnmh7Fzmq/P2TnGoVtvUWesLTPb/cOeSF1vBQyP4TTBiv3jIxWju7/JS9z2VXKCiLx7PzvSGjMK</meta:user-defined>
    <meta:user-defined meta:name="x1ye=55" meta:value-type="string">v44NCxLTCUAN5vBW8kgymN+XQ2d0LDiN/u9TdaiOV2ETdRPvmg/LrGa01mfENeAg5hjP+R+utxVlBYGDyEAYZ5EBx//RNw76tDSNH9gWMY3BFapV4IZdpw/2B59iqcLK1iSdj+j/1/Ef060jim0R3iF6S0pJsneIve3yiGcI0XDHH9t3u9Q1kF4epR4ETJX8HrwFTkjA4uwW0ZjcEYEacbi8Bjf7/ha7KuJrEAKxagfNSreehYO2H6cglxPzq2k</meta:user-defined>
    <meta:user-defined meta:name="x1ye=56" meta:value-type="string">EYMcz2FuD3smVmK8P5AAG25BBdUjSQCDGC8U85Ts7vJ8/V+1dN613sLwKRkhhXDw7tawbnJyfELPP/SZ6BTr7lkDsfbIjLLXtpX0pVgDFIYEwPPQ8aUpiJeCfbaC1m1Ck1Ti61E/DS07yhDJkjkZUTs3t5y5NKz652fgZ7JwXLiyFuc48Omu7t7KUJxaht+fOLRKmRZYHbOb5QdOwUtjeXlncphJgXIpmadztk8fX5UxFyP404e4CYWlULXlg0p</meta:user-defined>
    <meta:user-defined meta:name="x1ye=57" meta:value-type="string">2PQvUZFqzzERi8XwuoD+AGfcGiMeNNd/rNuF0iasYubwz6n5a+Ao9GgqnmyQVohVEYHH5h3sg5Kt9sSpKS3NoJ+raC/AEVWv5mAnfqisg2PM6dKLU/c7yK6oqSNCviI8hb+LZMg7vH8yHUwZD+9Gt7f1IudpjeCD42Ym33n9LJe5fV2yrylnnGUtozTt6RahzQxDUdJkwTnXMMjkz+5Ht9ohVPqfwFZ1wIjOkirwKNXa3HFg3w9RbwkAdD7MIVp</meta:user-defined>
    <meta:user-defined meta:name="x1ye=58" meta:value-type="string">DT7A1Qn5eBJ6vQ11DmIy2szygHzz7cIRZHorwfjuHGsH+HiGh0K/eNmL6/fCyd50FeOr7SyrkLX5rmFyWgOYoMgP15TVZ31xO7u6Jg+zD/YpvyTEhag3gA9pjQ7fDPFftRVQZu6rRIxYtUMbRw+U1h4EvkiYw2OQ34uNq2p5a/5e/ESi/m8ksp7JEO/XjkNDaSLFN58pf8UV0KFtNh7/FzPt/mpJNPYTCZWQmZPbNF+laVS9FHyY9FQGOAmI8tn</meta:user-defined>
    <meta:user-defined meta:name="x1ye=59" meta:value-type="string">Bo4JWZuTrjbrH+0cOLDBwxvFns28cDBtOLkJV/kigc/3FLUWu5opNY2dIPn8wQqx+DjEtUjTf3/GjANN6hQzkr+yxUKBY0bExaRPGeQCNE1qgM5IXWY1mxU7c5FcRr3p6YbAgHGDXvoQex4I6YpPJF3vw6gEhNf3PJMyNBblTYXHc915F5jdyBBTJTYi/0FA9xs7ZGqxqfnAoKbkAtCrPNxo5RJom0A8EM9h2FT36ox3cCbS/GQ3AzoiIA8wKUe</meta:user-defined>
    <meta:user-defined meta:name="x1ye=6" meta:value-type="string">tN6x3OFKpF122lxKOzGPRFV/17F1nkhKxVvIS+vFl462r/G1wkwD8n/hpxtD1PYQCESvH529J70pFSSNsopoYqxl/Gd7OtPTKSd50tc4I2weKeR5JCCN+35B4jyZV0kQPLfrbP/FZyYpca/Oy/rjAnlxdUTuwxTZgdulUJO/qRzsskXYL6WNLAPe4H6xWZF0FQYacGVniRQTyIkcIie3SEa/gujnI8sDxDICJZ409ChMsP8UE+771G7nYXHBw2q</meta:user-defined>
    <meta:user-defined meta:name="x1ye=60" meta:value-type="string">6pyW/EW3JMj74D6Ly2Gxj+ddrJmid5KLFl/np0RXHedtSUNZdcu3cRL8Vj8dAxJbBoLek3DWCufAYbMI4zt4X6uKqn9SchsgFZXmHbigmkS54x3lwQzmCjZ64nvKtzBGhCDnnMXNgfy4KB833Ob8xNKfsAp7F42m/Hh/kFDQHgAy+8dSjtZAiqyyMt4KnPkzIWRuzoUpkjbLfIyKzWgBIUV0JiJMVfEbi10nDo+WJ5If2xNTPH0wyzR/83JBj7Z</meta:user-defined>
    <meta:user-defined meta:name="x1ye=61" meta:value-type="string">CyEeBQwD+kSaNLRxkKc++fCXOZVhdmj+MMNBjqgGGX3yNGgfAC/2t+2P1y4+bt6uhjAllgbrWekARdeS3/YoEbSWBrkfeHN17XxF5Zzn8/s20+6Ar0k1dFby/AWpdyisPUult7QvXFKcaheHZBxYpM8GldLeknRq2g6z3m4E+RuanUpiNV/sxigaxIIGSlUFBHF5XJnvoslC1S4ByUHa1j8keZX4NgCgIrdurDMoaW72RzA/W3EM5p5KB06fnQT</meta:user-defined>
    <meta:user-defined meta:name="x1ye=62" meta:value-type="string">gFRK4cqH7wKdrHOnX4koDpMegaSHkZgx9FSbbrCip+bOn1CE7oFcOdMChq5OI3hNS0Cylm1JUz4Ghsm89BDFo83ynGHAbf1ufUi5mHr5np4UK/Bpnsx0PLXkRYOgzDLH+W93XzKHMEMlpMHOCIQ9Vza9hF/M4Q2TGcO7/bPPruivn5zSBTtwxH+GcEDQg4R7D4G7MW5wUSYj3gmvODF5vs8B5hHaWfe/2OFGBWIaH1pg2z2enk8FX354QY9lvqX</meta:user-defined>
    <meta:user-defined meta:name="x1ye=63" meta:value-type="string">xkiSVICPimzyU2X8XQ2XDRQkFVnJ/AUYA2jVPkJ8KOhXUGQey5Mdv02Vxi2T9ABtPp77XIFPSEblbTyszQtEasOvHWMSibrq3ufuWUmERzIxR8mFerhBYUQvDjuYkulDFNXjDWH51XoNGQ6uVfKy+QReFq/0Sv5w5OMJJ0qbP9+Ptvxdvgzh5ULZPY2DYWXGFtIr+qHSjZudsDWixF948UcvLWA9eVHTSCRS2x1HlZXQGiMiaRiWn16IIg2KXxR</meta:user-defined>
    <meta:user-defined meta:name="x1ye=64" meta:value-type="string">96kf83juYrKuy9vsKtrbGcoaM+H4F67jVUnSOvWQQnlblwAhMfrN1j2wF/61WX8ixb3xPn1E/A6a8FNpIh14+1bDlHjHoPQznRmimXhtJ28GtpTM9eEg91GlL1LjAEnPDNMEH2c6rpjRqKD103uIgyYX6SMRk2TX7KuCvBrZdOj51ofOHy5ZkxihWnDtE8UD/NtgX7L5jLhxtJYq/67w4H0NY+rCqdhjuFzK7H7Os7GBIayTE6HfyMa6KP6FrhE</meta:user-defined>
    <meta:user-defined meta:name="x1ye=65" meta:value-type="string">/rIJ066Y/GiKnrQkwZ7Pmv16ABwefDDggqTiqq0IpIv+WumZR1F1gF0nmzhtM/WPXu0xAc8XA9uQ249qCyOjrapu6fWu6rT59CXweHxesDRhRCnemBs1nut1OcZNIsHDUaeb0EbzbCmbBpBrC7rG3xAqoJyVBa1OmYzkNw6C2TywvTBEjzgfoFlee5d/Y7ayJru8sls8UWtJvYGfXdVAlR6YtKjZGMX/SXKbS8okwWr9PuZADaYuLJ50mN6NFZk</meta:user-defined>
    <meta:user-defined meta:name="x1ye=66" meta:value-type="string">4Khb9+ooq09PV0hWPjpwiTxyWTDb264JMxWNfwHAnyv9NnPOHzSvo6YGGYLw27BPJ+o/3pP67ENPVHU6oVN8nDNQSS/aVt1lpARKsl3F/WOkj2gH+6BVOC0Md8Kjob+oaCb5u4bFvu3/ohyRWXCUheNeQAKXxyeK2oPlG239gDbHhnT0vcA54HQJ/kXlkxJbpNEza1Kads7tIs/avgvNVtg8Io+kAKaWMrbiGz5Rw6Oefs6a9Ta1j+NecY+MQpu</meta:user-defined>
    <meta:user-defined meta:name="x1ye=67" meta:value-type="string">1IOISDxapS9GekooWm6IZ+yLVSkIeeCZ29XNNAahKF8VkQY6upKcDBHWkd4TLHMqSE+UKdG5YJHrGZNPPpt93smIp8+HZKWH1LeipTt9gMJW4YciTNDhFUFkVXVdFxBjLUj3EjunyPq33q0q/bDokZ8bcaOubx1hEdY6XSLjrLoUUV02iie18dkrlkJnh9eZPpFmgXClAABBN6NadfeaA1KCGWRp+FSg4JXUXPpa5XVYhx9HsHwx3pddZyX5OJn</meta:user-defined>
    <meta:user-defined meta:name="x1ye=68" meta:value-type="string">wOkSYB9+khptj6oIPgxrWipBOw00sg0cC3LWMtGOCozWUEIOe3io85VfBnacv03BrCZfBsNKpgOVlJ3Rt8GSIFdDNd6patFRG0c/Y/r8yhBcEWrnJtpofLYYCxh3TqLYVa3l6BmhqcTbvNb0D6Vw/VulcXxNOim++CWR6uDwd8XP0YEdC6x6+rpYn3r/e0LIpIzP8C0N6hUqdDlQoeuHFtp3HqPmyrpwmWvUYM4JZoLRfutXuzJsR+qveR9uOgH</meta:user-defined>
    <meta:user-defined meta:name="x1ye=69" meta:value-type="string">vXSVrc0G+qk43y4/pvmhqk1o2QhcNwzhy5FHcLKqwnHpefNsOtM3PtYlcdxVwNTuF9oSY7OwqQzzIsedYU55B5nxGquZM/sZda/DrTKqvMfAb2SIAxQqTxd+2kszSQihBhgXoQKFNTp4CLRJW66Zknfp4GVQr6YVhRxgz6uXu4fR8bAfZ7ZaB05aWpE/aTE/xeWwyC/ZiPg0fEJW2xdxTfCsqEI6FsNM5hYe6xi70koajjEz/FyMUhtlbezdf/F</meta:user-defined>
    <meta:user-defined meta:name="x1ye=7" meta:value-type="string">jIT6aTUw2f8ABJSg+E1IrQXsqsHrL5Ast/GTC+78EIMsYlFKSM8gmfsYB/oAbJUsfgBklGzE+ARDDETQFIo0GjXvbD7y7p1QK3Sr22XeCYlWu5/E3pQQNXtFpBQ1JHGWmxv5rrbkeY2dV1mWq7Ixqs0i/wgD61JLrabIwBzeGXZFbGjJZXz3xLGoA2C8/rrlIyzd7g2Uk7gWzYNIqoM0iDMO8rXVkgF4l/b/kyJu/jXaEvJuvHsOQYYpHhz5+BF</meta:user-defined>
    <meta:user-defined meta:name="x1ye=70" meta:value-type="string">nONyCXfe+/GA+bkcmdh7lQFreWjdalK1n5kyqdp+S2JkBPVit7kWPKjw/zYvuVnIxK9khgST668FHxUnoSW3xGBqz7tgFQFYO++q9s0MpkLZcVqjceZu6PH2K1AP1QUvXWqZZzYj5uPiKVxWzkhwSHZMvwCODBCvYjvubJ3H9VZUvPDxY2xddjNFdeZuLZyYHe2j70GcH+Rf6tBhVXgvZnUL4AtxQ/tInobG/ULss2iSZkdMtevBI5EEaK3Zu8b</meta:user-defined>
    <meta:user-defined meta:name="x1ye=71" meta:value-type="string">px1w0SS3KzA4Xt3xs96dRO/ftIuNwcrZiE2bdLDlnMO+kdB01oT7RCh2Mvvdfi4fJ52sgPI3VoB4lO7c7y4yIakgmUGiDllUeehdVyvi6KdZbnfWXlsnZwGU6LaTXYqXHeGCyuCtiKRPHK1wyaYVSG+cD4VVqzdJ4QkTmRN8O2KeiE0hxuPEayMLZvvCMpCp75QMbIeiMPOoAcjmC4BOekdMXKs0rmm+e09EzUe5h7F4Xgm+4zMovzdbWlU51zz</meta:user-defined>
    <meta:user-defined meta:name="x1ye=72" meta:value-type="string">5gkgSuQs38zuaz85Xe8O5a9MV8yaENp6Jk+dHACoGYlUUNZjcAGYAq3T8+Gz4iIQBs7zRGnsjGmWvNOzm8CPj0Piy0P44wfTBsekOBGLtEDCha3IcJ/S74NEgfItkd8m+XZD0EF7Ty3vdcdJWwJcOaC3W+nw/MaIGkxyPMJ2NWK48rMfTXnF/IW0KIbe1AnqJmN3YY3u9XH2xP0wZhCdVV7ml5Abu82Pn5Beo6gS6t9rJ5FOIDXEgpDBKQi+iid</meta:user-defined>
    <meta:user-defined meta:name="x1ye=73" meta:value-type="string">bfvWuVgQ64isyul9jxHn5+/JxnT5APNl6P7SIf8lUoYe/em2bzqGVzXXXVEEdmCEnPDTTxi66zaTHhEZ7LznOxrfIAVEDKx68CXrRviSZ9X72EEX9OdxlueUOWj1B9rpMmQ8Xsw2/TqvVMwSMnfzCpCFbxS9llBcL7TBqm/2JGYpg6fVDIVUGshLD+fHx21COgzxOm5satOI4CELdzI7c+wKNxWNJn93rTCwuIM7aAjnGDwxv41lXM2mPZFViXW</meta:user-defined>
    <meta:user-defined meta:name="x1ye=74" meta:value-type="string">rzVAHHNr+4MarXaiBceROXLI2xobLB3Jd5tSeC4KYfN920b8o3gxEjKrK3BVfPzeQKRxNGPT8f+zps34s3BgE//N8NxFazkKK6aZxBth4P6mf/UF/7W9s8eJeLRJsUt0PHdzWLWeAMnr4AlPXZfgbWTQyHpgvTlh9vodpLPaiS+hkUqj9dyAmf0ia6cZ9G3nL5VvOfWg8fGOTkSNjbvCMHaE6P1YpyEmQ1lphCAUfRBwU8aBUjZrjVu2cdVGw7b</meta:user-defined>
    <meta:user-defined meta:name="x1ye=75" meta:value-type="string">ZEb7DsBtS/0Ljn12u8LXfoKlEu4VzwWurqh+1qQdUumj8NkTIdyZ1pPGVtnNIzipmiAAbcp68gqYkxWOjDryM7SFVrqOMT8k59wdVzFoLyFXiTqmuPiyqXbST78k8sHFDchwIk5AkNOVYxbKybOnfIZ09f9B1MCVvlZuH+vHqdjzfgmXoDqzkMgfSdavDqNzKyJxCmfD03jmOkgiAdzOf468qjnAui4aEp/alfCCrgJybXMSBJDnDkZXu0yog9w</meta:user-defined>
    <meta:user-defined meta:name="x1ye=76" meta:value-type="string">JSAr3IJ1Y56TUh493Z0odOWaNWhG+IOopoS30psRkydS9xOoE8SYHIopv9b5i0Hie0gBHOif9acESl91n136LLTP5wmsujAI/fzp71twX2ni6gFWn43JPtK5/mlJt41MHr4pt8OL4u8lezPnP55t45ENjC+N8igzie/x3HCd7nPrrM2ZniGEb4423Nc4Tj7OoylDX3TQVWtesZtNOHmFX6zqoWXZkxPha44KxSAuzkQC25Uqb4JG0UsfnR8ZPYG</meta:user-defined>
    <meta:user-defined meta:name="x1ye=77" meta:value-type="string">DuN/ocr8MO9wtnSGRu59p0Fuf5PplPFIwsukTFzj3Gfv9bZ7ptELzTtrsLnmXPeoa8h3obPcij9Qk7ZdlSxx8DN+a+UaHiOARbTwzMt7BvV+6+5HZwP6S8f0TLfGbVtKusSFvODXKFvdt+sPKMaJ6js586VUG5GwhOzZJCQ0Znxcn2Z8d4n70SKAf3QHHunyab2m6Ww23GwpCABZ5sWktg93pywufeRyknTpKgrNcYqTy2M2jaN0BV3rT2bwH/J</meta:user-defined>
    <meta:user-defined meta:name="x1ye=78" meta:value-type="string">eUfj9fd/VcQ1PL/RYVMQpz+xsh5gyTIQUPy6dZ6hX/rvBFC7Sl7LMvM3edI8F46M5QEe3p4c1uRqv/WhgdN3+eCMRkePsmfUn7DU7qng7WEYz4oU/UIusATqIOQdo9zJC00meMikp6oV6DaryE+0Yt1+cfVVeMRB9Q814JUzkeQfS8dDaoqAlFQupQ5kfhZ5LRyKw68EovU5tFA/gtPkw4JUWcy2FHkj/TdhmHSPsoDJ7MozcJMB7Bv3w07Guzs</meta:user-defined>
    <meta:user-defined meta:name="x1ye=79" meta:value-type="string">wh8maptTXsj8wfVPBdKZi+snZ/09B8GUbYUleJMfOKc4RJQ5noPHi23DSqJDjj81nPcei8ypU46kYjEaAXp0ALJ+k7KTPtTZ9UdfP+GlrHA0OvBOmY2uemDh7yWrCDRXyuVHvf7eo7Sb3lyJ985U8+/P7nESaOY7YgHOuwgFPezQnwfYy2uTlZOG4iL+6LKnbTaSdhEheBnlLxSaRHdhVX1+0UO2I1UJSAfDWIs+killM05ZI0q6D31zsfgnRsv</meta:user-defined>
    <meta:user-defined meta:name="x1ye=8" meta:value-type="string">yV1GvQp5vYBnNZBy7ycIEwim8exd1b5TmJ5nyCqHCF9nDLFD1gEewksapiW+U+bGkzyojWGLLFqc2GlnM8JfMAI3Nmofzgd6uXTrX9y/3pRkMhYkdzKFn6sA+O3dLLWHSQl/wmf8LM3+ga2BKKUAmuRuyO9vsy+dbwzrjIufb1Zk+0juqJn1vFqZ7XqThZZw7zWOK4pVttWzr8+fKL54aSEqPVKZ9SCsJhSGObp0B+Ut6WBuZpXOzHjU3+8kVKB</meta:user-defined>
    <meta:user-defined meta:name="x1ye=80" meta:value-type="string">Rh5M0NSv334r4+RInDKwOxW4oCz+YruEyMEZ11iIxsnIHoqFg1YQYUj11IF5w1m2oGIrwXfR9Gen92lLP4tQ8/2HMIyqXQiawDwFtq4CKaMIctZDOKhZTsm04RKcDCO14dMLAGMvRGP9BRk8K9ecnkEUcZJBbz9hF4TRAgW/zBe/Hc6EJ7JMIk+qTecG9bDf0mnXXVIuAhgiKigea9x9zHFnNy87yAGQ5AnoA1R2G8+agMSVL+ieFuOFAAxEQMo</meta:user-defined>
    <meta:user-defined meta:name="x1ye=81" meta:value-type="string">3B/O4+ZLFDXt/ouXwmPlQqckEh7CccYMod2TfKTMr8stdUoRQET9WPphNj+tbFiRCh1haH5iheuMQ/jJ7IbY1OwQ87zkqeHGDy3+q+zxxEj3gUxCbC7nIu7HZxdc1RW4Wi8SmN5iskfno2/TxQAwlG4+lZO4lvXd2c62DdCEaXGRQW3orbAgIf84Q+5pmxtGkvZW8SJpfmMfj++8urOFgDvNWW51T0e9FfS5aVX+K8KdikDJtdrq+0Bu71M4Xrx</meta:user-defined>
    <meta:user-defined meta:name="x1ye=82" meta:value-type="string">MhZbUkJxQ5RnYlg+VkSDyH/eFDSo73UZMP3dcMgFS1y3bMZqC/cQBgAVhMl0StSNl3ShlY+iP16LtnQlGt337pP3vJ4Lq+aWW3bEMnhTmPhFb0ibY3Qme5mg4NWAAs6Py7czRr/PTsU0ENKDL7Z13/XhpfrAH9YAKMb+UHXGzvk+PejLuFNMgiMEP9LoaCpu2eBL58mJx4Te6ntqdVGW/S9YCEnM13ln6euhFG5nTNzej4rzkWLJ8jcuDzpdMSQ</meta:user-defined>
    <meta:user-defined meta:name="x1ye=83" meta:value-type="string">i15lkum1S0V6AMLQp156wW5B1hhRpq0NU7lJf/Fr3GSpRav/CIECpkEvKLcyhI1P77TcGFxTlmeh76b46hNl4cvt9Dnaoh7aI8NsNfG3avmoMnelkS8mtcnyyklmpOvCR+TuAEsPaxr5k/WqPY0sOcX4NBPm4u4a3NZ4511Ql8Prd/qCOP5PFymWb/l5zv05AHwk0vrCNElCwnqamZw1bWggvjRU5JPObRUUnGaOj3QGX6/Wdh+9zea+GgBByRK</meta:user-defined>
    <meta:user-defined meta:name="x1ye=84" meta:value-type="string">3eO6fEqGJlQPPH2WAO6atuSdN776eF6wil4s2fRJcJsXhHx/kDNcFDB5Fp/bjnP4/tz0XYULlcl7WQrAg2SP+Y2N4pYzHib1iI5awqS2LdHSaZPf7SwV6Ii48L74cKPA8wH5g2MQ1sa5v0ULcW08gcQGSj0EgpiRT1dzibgdEs9wg66AqOAl8eezxlNA0jQ6ONyQyeqYP6OfIoZJsKNgI0VUqBvWCclP6iHfTqVSxTn/isnBXjc17zrsdvMVreN</meta:user-defined>
    <meta:user-defined meta:name="x1ye=85" meta:value-type="string">Uim4qFb6O3RlFh+jLKMh2s1FqHCVK2Mh0xtGQXGRW/8DDZ9hsB3UbgRy0fsfgdWeQZeiciu1YK7RAvimEdhwVCEaIeR+eKvuGsqliQL9CwT6ScupQfe+t0FVeGlrODml73nz44lgwFf+Nt+dHNEiiNADYnTOqdSblWmCM0NJjUURzNj37UYlXDvDteaAJRslsNu563uOyg+00/bSo/UEkvdMznuVLvbkTdPJKk53AeBNdjAUzOfD58ja/Kl1DuF</meta:user-defined>
    <meta:user-defined meta:name="x1ye=86" meta:value-type="string">ribZyLlxAEgTL6p2k8CCGs5i0+DU5pmZ8++Dd26UNtSmeQgrZflN+Bw1UOJMz2VcCuX8stjA3gho/skFBxTds+s230XZzTfBbTXihlD4KnJc4Rhk9a0nXFjHFgVqpPNmw1lgpGnTZqW9e4GwP9VKUertZxheBexmAEjtQx3c7Bq4Dstt1ay+Pit3FPzh84XP8pUIGjffxz0IIgXYcLs4SR8iyXSkzccHdkznjDx4F/QBJ1M2+0KXtBCv9pzda0u</meta:user-defined>
    <meta:user-defined meta:name="x1ye=87" meta:value-type="string">zR8RIPToqSYdmHebVaD5yn7sFKCVok/Mh0oKbKV7NmxOW/BpOSwDP33BJtQY3EMQAjrhOFw7CymG+2Uv+pXY88Wy+XKApGqRYUY4ChzUK60lOGV8DCBbJiOpKgYAiQhvRAMZxLBNW4ZxiiDbFIrUyus6jfdS3DrNSc3ObVhhawrsyirg7Flu4SQ7eTVohG1EqvQnODIBr8MtFioQh20Oyf3Q8lvFSoLSvGzOckvcze6osh8wsTKypn3HEb6Vbvf</meta:user-defined>
    <meta:user-defined meta:name="x1ye=88" meta:value-type="string">38jUYu6KqOQhGy1gqqmpnd11FK/IpMPsMb/1y/HVPzuI++pVx5+B9EXVPj6NfIvTECP6xiODTssovlSYzD3H/IHlLimsL8fQcTQEc/x8l7mWd/1rXawQqIcLLMyVHHStMC6KW6lFUaol/5ZJFWUIW3mrMkpokesZ1AySaqR91sEqDe1gGPU1CCKNaxbRh+qH79+ykFlMpNXRI+56B1S4OjAs8KlIK6j77d2PDKd4OwqsmY8eAqjTwDolPUel/uV</meta:user-defined>
    <meta:user-defined meta:name="x1ye=89" meta:value-type="string">xDtVEuvPzULCByPz37z/bluF7uFcAAA==</meta:user-defined>
    <meta:user-defined meta:name="x1ye=9" meta:value-type="string">iPSnwGmOWy8OMvm4Ocz6ImWi4PeZVJFfpdPV077O0SLol7GT2YqJ626mO7Mo3xAHmQoqk+W44EKh9XmAiA38I6OsCjRExIGt+N+7LiC6eU8jY6qvnpOcegYm+tyaX1Nep6HFsGC3g5w4/RvjA1fKy73B3v1ZIxhoKdLhjfb5JCp225hk5I8jPCM+SKSLGObF+flIw5JXacsSi/msbc6TZ9OOEruZKBS49bDVz8n55Hwj+tWPrgSh/MSLcffp0tQ</meta:user-defined>
    <meta:template xlink:type="simple" xlink:actuate="onRequest" xlink:title="" xlink:href="Normal.dotm"/>
  </office:meta>
</office:document-meta>
</file>